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4">
      <style:text-properties fo:font-size="11pt" style:font-size-asian="11pt" style:font-size-complex="11pt"/>
    </style:style>
    <style:style style:name="ce10" style:family="table-cell" style:parent-style-name="Normal_32_2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37">
      <style:text-properties fo:font-size="11pt" style:font-size-asian="11pt" style:font-size-complex="11pt"/>
    </style:style>
    <style:style style:name="ce14" style:family="table-cell" style:parent-style-name="Default" style:data-style-name="N36">
      <style:text-properties fo:font-size="11pt" style:font-size-asian="11pt" style:font-size-complex="11pt"/>
    </style:style>
    <style:style style:name="ce15" style:family="table-cell" style:parent-style-name="Default" style:data-style-name="N4">
      <style:table-cell-properties style:vertical-align="automatic" fo:wrap-option="wrap"/>
      <style:text-properties fo:font-size="11pt" style:font-size-asian="11pt" style:font-size-complex="11pt"/>
    </style:style>
    <style:style style:name="ce16" style:family="table-cell" style:parent-style-name="Normal_32_3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17" style:family="table-cell" style:parent-style-name="Normal_32_4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18" style:family="table-cell" style:parent-style-name="Normal_32_5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19" style:family="table-cell" style:parent-style-name="Normal_32_6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20" style:family="table-cell" style:parent-style-name="Normal_32_7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21" style:family="table-cell" style:parent-style-name="Normal_32_8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23" style:family="table-cell" style:parent-style-name="Normal_32_9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Normal_32_14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27" style:family="table-cell" style:parent-style-name="Normal_32_13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28" style:family="table-cell" style:parent-style-name="Normal_32_12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Normal_32_10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31" style:family="table-cell" style:parent-style-name="Normal_32_11" style:data-style-name="N36">
      <style:table-cell-properties style:vertical-align="automatic" fo:background-color="transparent"/>
      <style:text-properties fo:font-size="11pt" style:font-size-asian="11pt" style:font-size-complex="11pt"/>
    </style:style>
    <style:style style:name="ce32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5-07T00:00:00" table:style-name="ce10">
            <text:p>2026-05-07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Payment to Adrian for maintenance and release support #100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930.48" table:formula="of:=[.L5]+[.M5]" table:style-name="ce9">
            <text:p>930.48</text:p>
          </table:table-cell>
          <table:table-cell office:value-type="float" office:value="915.48" table:style-name="ce9">
            <text:p>915.48</text:p>
          </table:table-cell>
          <table:table-cell office:value-type="float" office:value="15" table:style-name="ce9">
            <text:p>15.00</text:p>
          </table:table-cell>
          <table:table-cell office:value-type="float" office:value="58" table:style-name="ce9">
            <text:p>58.00</text:p>
          </table:table-cell>
          <table:table-cell office:value-type="float" office:value="1.1448199999999999" table:style-name="ce13">
            <text:p>1.14482</text:p>
          </table:table-cell>
          <table:table-cell office:value-type="float" office:value="195.4008" table:formula="of:=[.K5]*[Sheet2.$B$9]" table:style-name="ce9">
            <text:p>195.4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4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table:style-name="ce14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5-07T00:00:00" table:style-name="ce16">
            <text:p>2026-05-07</text:p>
          </table:table-cell>
          <table:table-cell office:value-type="float" office:value="402" table:style-name="ce11">
            <text:p>402</text:p>
          </table:table-cell>
          <table:table-cell office:value-type="string" table:style-name="ce11">
            <text:p>[Maintainer Honorarium] kadet1090 #402</text:p>
          </table:table-cell>
          <table:table-cell office:value-type="float" office:value="200" table:style-name="ce12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8]/[.O8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date" office:date-value="2026-05-07T00:00:00" table:style-name="ce17">
            <text:p>2026-05-07</text:p>
          </table:table-cell>
          <table:table-cell office:value-type="float" office:value="423" table:style-name="ce2">
            <text:p>423</text:p>
          </table:table-cell>
          <table:table-cell office:value-type="string" table:style-name="ce2">
            <text:p>[Maintainer Honorarium] hyarion #423</text:p>
          </table:table-cell>
          <table:table-cell office:value-type="float" office:value="200" table:style-name="ce9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9]/[.O9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5-07T00:00:00" table:style-name="ce18">
            <text:p>2026-05-07</text:p>
          </table:table-cell>
          <table:table-cell office:value-type="float" office:value="448" table:style-name="ce2">
            <text:p>448</text:p>
          </table:table-cell>
          <table:table-cell office:value-type="string" table:style-name="ce2">
            <text:p>[Maintainer Honorarium] Connor9220 #448</text:p>
          </table:table-cell>
          <table:table-cell office:value-type="float" office:value="200" table:style-name="ce9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10]/[.O10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5-12T00:00:00" table:style-name="ce19">
            <text:p>2026-05-12</text:p>
          </table:table-cell>
          <table:table-cell office:value-type="float" office:value="449" table:style-name="ce2">
            <text:p>449</text:p>
          </table:table-cell>
          <table:table-cell office:value-type="string" table:style-name="ce2">
            <text:p>[Maintainer Honorarium] Sliptonic #449</text:p>
          </table:table-cell>
          <table:table-cell office:value-type="float" office:value="223.66" table:style-name="ce9">
            <text:p>223.66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PayPal:PayPal USD</text:p>
          </table:table-cell>
          <table:table-cell office:value-type="string" table:style-name="ce2">
            <text:p>Depenses:Autres dépenses:FPADF:FC ecosystem:FC ecosystem USD</text:p>
          </table:table-cell>
          <table:table-cell office:value-type="string" table:style-name="ce4">
            <text:p>CURRENCY::USD</text:p>
          </table:table-cell>
          <table:table-cell office:value-type="float" office:value="225.47" table:style-name="ce9">
            <text:p>225.47</text:p>
          </table:table-cell>
          <table:table-cell office:value-type="float" office:value="225.47" table:style-name="ce9">
            <text:p>225.47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5-28T00:00:00" table:style-name="ce19">
            <text:p>2026-05-28</text:p>
          </table:table-cell>
          <table:table-cell office:value-type="float" office:value="476" table:style-name="ce2">
            <text:p>476</text:p>
          </table:table-cell>
          <table:table-cell office:value-type="string" table:style-name="ce20">
            <text:p>[Maintainer Honorarium] pieterhijma #476</text:p>
          </table:table-cell>
          <table:table-cell office:value-type="float" office:value="200" table:style-name="ce9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12]/[.O12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42" table:formula="of:=[.K12]*[Sheet2.$B$9]" table:style-name="ce9">
            <text:p>42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table:style-name="ce14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5-07T00:00:00" table:style-name="ce21">
            <text:p>2026-05-07</text:p>
          </table:table-cell>
          <table:table-cell office:value-type="float" office:value="168" table:style-name="ce11">
            <text:p>168</text:p>
          </table:table-cell>
          <table:table-cell office:value-type="string" table:style-name="ce11">
            <text:p>Monthly payment to Max Wilfinger for Bug Triage Project #168</text:p>
          </table:table-cell>
          <table:table-cell office:value-type="float" office:value="1500" table:style-name="ce12">
            <text:p>1,5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500" table:style-name="ce9">
            <text:p>1,500.00</text:p>
          </table:table-cell>
          <table:table-cell office:value-type="float" office:value="1500" table:formula="of:=[.K14]" table:style-name="ce22">
            <text:p>15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315" table:formula="of:=[.K14]*[Sheet2.$B$9]" table:style-name="ce9">
            <text:p>315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4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5-28T00:00:00" table:style-name="ce23">
            <text:p>2026-05-28</text:p>
          </table:table-cell>
          <table:table-cell office:value-type="float" office:value="314" table:style-name="ce11">
            <text:p>314</text:p>
          </table:table-cell>
          <table:table-cell office:value-type="string" table:style-name="ce24">
            <text:p>pieterhijma - OCCT liaison #314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22">
            <text:p>1000</text:p>
          </table:table-cell>
          <table:table-cell office:value-type="float" office:value="1000" table:formula="of:=[.K16]" table:style-name="ce22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210" table:formula="of:=[.K16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4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4"/>
          <table:table-cell table:style-name="ce11"/>
          <table:table-cell office:value-type="string" table:style-name="ce7">
            <text:p>Blog/Website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4-07T00:00:00" table:style-name="ce14">
            <text:p>2026-04-07</text:p>
          </table:table-cell>
          <table:table-cell office:value-type="float" office:value="217" table:style-name="ce11">
            <text:p>217</text:p>
          </table:table-cell>
          <table:table-cell office:value-type="string" table:style-name="ce25">
            <text:p>Blog coordination grant #217 (Alex Prokoudine)</text:p>
          </table:table-cell>
          <table:table-cell office:value-type="float" office:value="525" table:style-name="ce12">
            <text:p>525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40" table:formula="of:=[.L19]+[.M19]" table:style-name="ce9">
            <text:p>540.00</text:p>
          </table:table-cell>
          <table:table-cell office:value-type="float" office:value="525" table:formula="of:= [.D19]" table:style-name="ce9">
            <text:p>525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110.25" table:formula="of:=[.D19]*[Sheet2.B9]" table:style-name="ce9">
            <text:p>110.25</text:p>
          </table:table-cell>
          <table:table-cell office:value-type="float" office:value="540" table:formula="of:=[.L19]+[.M19]" table:style-name="ce9">
            <text:p>54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4"/>
          <table:table-cell table:style-name="ce11"/>
          <table:table-cell table:style-name="ce25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5-07T00:00:00" table:style-name="ce26">
            <text:p>2026-05-07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Payment to concretedog (Jo Hinchliffe) for blog content #113</text:p>
          </table:table-cell>
          <table:table-cell office:value-type="float" office:value="570" table:style-name="ce12">
            <text:p>57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60" table:style-name="ce22">
            <text:p>560</text:p>
          </table:table-cell>
          <table:table-cell office:value-type="float" office:value="560" table:formula="of:=[.K21]" table:style-name="ce9">
            <text:p>56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formula="of:=([.L21]+[.N21])/([.K21]-[.M21])" table:style-name="ce13">
            <text:p>1.00000</text:p>
          </table:table-cell>
          <table:table-cell office:value-type="float" office:value="117.6" table:formula="of:=[.K21]*[Sheet2.B9]" table:style-name="ce9">
            <text:p>117.6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4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5-07T00:00:00" table:style-name="ce27">
            <text:p>2026-05-07</text:p>
          </table:table-cell>
          <table:table-cell office:value-type="float" office:value="372" table:style-name="ce11">
            <text:p>372</text:p>
          </table:table-cell>
          <table:table-cell office:value-type="string" table:style-name="ce11">
            <text:p>mnesarco - Addon Ecosystem Technical Lead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2">
            <text:p>CURRENCY::EUR</text:p>
          </table:table-cell>
          <table:table-cell office:value-type="float" office:value="435.43" table:style-name="ce9">
            <text:p>435.43</text:p>
          </table:table-cell>
          <table:table-cell office:value-type="float" office:value="500" table:formula="of:=[.D23]" table:style-name="ce9">
            <text:p>500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91.440299999999993" table:formula="of:=[.K23]*[Sheet2.B9]" table:style-name="ce9">
            <text:p>91.44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3">
          <table:table-cell table:style-name="ce14"/>
          <table:table-cell table:style-name="ce11"/>
          <table:table-cell office:value-type="string" table:style-name="ce7">
            <text:p>Renumeration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5-12T00:00:00" table:style-name="ce28">
            <text:p>2026-05-12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Monthly Stipend for FPA Chair #116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office:value-type="string" table:style-name="ce29">
            <text:p>BE 0655.581.725</text:p>
          </table:table-cell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29.55" table:style-name="ce1">
            <text:p>429.55</text:p>
          </table:table-cell>
          <table:table-cell office:value-type="float" office:value="355" table:formula="of:=[.K25]-[.P25]" table:style-name="ce9">
            <text:p>355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74.550000000000011" table:formula="of:=[.K25] - [.K25]/(1+[Sheet2.B9])" table:style-name="ce9">
            <text:p>74.55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4"/>
          <table:table-cell table:number-columns-repeated="2" table:style-name="ce11"/>
          <table:table-cell table:style-name="ce12"/>
          <table:table-cell table:style-name="ce4"/>
          <table:table-cell table:style-name="ce29"/>
          <table:table-cell table:style-name="ce4"/>
          <table:table-cell table:number-columns-repeated="2" table:style-name="ce2"/>
          <table:table-cell table:style-name="ce4"/>
          <table:table-cell table:style-name="ce1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5-07T00:00:00" table:style-name="ce30">
            <text:p>2026-05-07</text:p>
          </table:table-cell>
          <table:table-cell office:value-type="float" office:value="455" table:style-name="ce2">
            <text:p>455</text:p>
          </table:table-cell>
          <table:table-cell office:value-type="string" table:style-name="ce29">
            <text:p>[Contract] Reqrefusion - Financial officer - 900 EUR #455</text:p>
          </table:table-cell>
          <table:table-cell office:value-type="float" office:value="900" table:style-name="ce9">
            <text:p>9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915" table:formula="of:=[.L27]+[.M27]" table:style-name="ce9">
            <text:p>915.00</text:p>
          </table:table-cell>
          <table:table-cell office:value-type="float" office:value="900" table:formula="of:= [.D27]" table:style-name="ce9">
            <text:p>900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189" table:formula="of:=[.D27]*[Sheet2.B9]" table:style-name="ce9">
            <text:p>189.00</text:p>
          </table:table-cell>
          <table:table-cell office:value-type="float" office:value="915" table:formula="of:=[.L27]+[.M27]" table:style-name="ce9">
            <text:p>915.00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5-26T00:00:00" table:style-name="ce31">
            <text:p>2026-05-26</text:p>
          </table:table-cell>
          <table:table-cell office:value-type="float" office:value="251" table:style-name="ce1">
            <text:p>251</text:p>
          </table:table-cell>
          <table:table-cell office:value-type="string" table:style-name="ce22">
            <text:p>Monthly Donation to Codeberg e.V. #251</text:p>
          </table:table-cell>
          <table:table-cell office:value-type="float" office:value="10" table:style-name="ce12">
            <text:p>1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14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22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4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1048541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32">
            <text:p>Rate</text:p>
          </table:table-cell>
          <table:table-cell office:value-type="string" table:style-name="ce33">
            <text:p>VAT</text:p>
          </table:table-cell>
          <table:table-cell office:value-type="string" table:style-name="ce33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5" number:min-decimal-places="5" number:min-integer-digits="1"/>
    </number:number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Turan Furkan Topak</dc:creator>
    <meta:creation-date>2025-02-03T10:20:43Z</meta:creation-date>
    <dc:date>2026-06-25T11:18:42Z</dc:date>
    <meta:editing-cycles>43</meta:editing-cycles>
    <meta:editing-duration>PT24490S</meta:editing-duration>
  </office:meta>
</office:document-meta>
</file>