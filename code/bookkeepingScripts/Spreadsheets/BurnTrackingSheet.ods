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4" style:family="table-cell" style:parent-style-name="Default" style:data-style-name="N3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7" style:family="table-cell" style:parent-style-name="Default" style:data-style-name="N37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8" style:family="table-cell" style:parent-style-name="Default" style:data-style-name="N2">
      <style:table-cell-properties style:vertical-align="automatic" fo:wrap-option="wrap"/>
    </style:style>
    <style:style style:name="ce9" style:family="table-cell" style:parent-style-name="Default" style:data-style-name="N37">
      <style:table-cell-properties style:vertical-align="automatic" fo:wrap-option="wrap"/>
    </style:style>
    <style:style style:name="ce10" style:family="table-cell" style:parent-style-name="Default" style:data-style-name="N36"/>
    <style:style style:name="ce11" style:family="table-cell" style:parent-style-name="Default" style:data-style-name="N0">
      <style:table-cell-properties fo:border="thin solid #000000" style:vertical-align="automatic" fo:background-color="#DDDDDD"/>
      <style:text-properties style:font-name="Liberation Sans" style:font-name-asian="Liberation Sans" style:font-name-complex="Liberation Sans"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37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48708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.81102in" svg:y="4.28543in" svg:width="6.29646in" svg:height="3.5503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1" table:default-cell-style-name="ce1"/>
        <table:table-column table:style-name="co5" table:number-columns-repeated="998" table:default-cell-style-name="ce1"/>
        <table:table-column table:style-name="co3" table:number-columns-repeated="15360" table:default-cell-style-name="ce1"/>
        <table:table-row table:number-rows-repeated="3"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table:style-name="ce3"/>
          <table:table-cell table:number-columns-repeated="13" table:style-name="ce2"/>
          <table:table-cell table:number-columns-repeated="16370" table:style-name="ce1"/>
        </table:table-row>
        <table:table-row table:style-name="ro2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table:style-name="ce3"/>
          <table:table-cell table:style-name="ce4"/>
          <table:table-cell table:number-columns-repeated="2" table:style-name="ce3"/>
          <table:table-cell office:value-type="float" office:value="180000" table:style-name="ce3">
            <text:p>180000</text:p>
          </table:table-cell>
          <table:table-cell office:value-type="string" table:style-name="ce3">
            <text:p>(rounded)</text:p>
          </table:table-cell>
          <table:table-cell table:number-columns-repeated="7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13" table:style-name="ce3"/>
          <table:table-cell table:style-name="ce2"/>
          <table:table-cell office:value-type="string" table:style-name="ce1">
            <text:p>avg</text:p>
          </table:table-cell>
          <table:table-cell table:number-columns-repeated="16369"/>
        </table:table-row>
        <table:table-row table:style-name="ro1">
          <table:table-cell table:style-name="ce3"/>
          <table:table-cell office:value-type="string" table:number-columns-spanned="3" table:number-rows-spanned="1" table:style-name="ce13">
            <text:p>Q1</text:p>
          </table:table-cell>
          <table:covered-table-cell table:number-columns-repeated="2"/>
          <table:table-cell office:value-type="string" table:number-columns-spanned="3" table:number-rows-spanned="1" table:style-name="ce14">
            <text:p>Q2</text:p>
          </table:table-cell>
          <table:covered-table-cell table:number-columns-repeated="2"/>
          <table:table-cell office:value-type="string" table:number-columns-spanned="3" table:number-rows-spanned="1" table:style-name="ce13">
            <text:p>Q3</text:p>
          </table:table-cell>
          <table:covered-table-cell table:number-columns-repeated="2"/>
          <table:table-cell office:value-type="string" table:number-columns-spanned="3" table:number-rows-spanned="1" table:style-name="ce14">
            <text:p>Q4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Actual</text:p>
          </table:table-cell>
          <table:table-cell office:value-type="currency" office:value="16356.68" table:style-name="ce7">
            <text:p>$16,357</text:p>
          </table:table-cell>
          <table:table-cell office:value-type="currency" office:value="16356.68" table:style-name="ce7">
            <text:p>$16,357</text:p>
          </table:table-cell>
          <table:table-cell office:value-type="float" office:value="12662.21" table:style-name="ce8">
            <text:p>12662.21</text:p>
          </table:table-cell>
          <table:table-cell office:value-type="currency" office:value="28332.49" table:style-name="ce7">
            <text:p>$28,332</text:p>
          </table:table-cell>
          <table:table-cell table:style-name="ce9"/>
          <table:table-cell table:number-columns-repeated="7" table:style-name="ce7"/>
          <table:table-cell table:style-name="ce2"/>
          <table:table-cell office:value-type="currency" office:value="18427.014999999999" table:formula="of:=SUM([.B10:.M10])/COUNT([.B10:.M10])" table:style-name="ce10">
            <text:p>$18,427.02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cast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office:value-type="currency" office:value="15000" table:formula="of:=[.$E$6]/12" table:style-name="ce7">
            <text:p>$15,000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1">
            <text:p>Variance to Plan</text:p>
          </table:table-cell>
          <table:table-cell office:value-type="currency" office:value="1356.6800000000003" table:formula="of:=[.B10]-[.B11]" table:style-name="ce7">
            <text:p>$1,357</text:p>
          </table:table-cell>
          <table:table-cell office:value-type="currency" office:value="1356.6800000000003" table:formula="of:=IF([.C10]=0; 0; [.C10]-[.C11])" table:style-name="ce7">
            <text:p>$1,357</text:p>
          </table:table-cell>
          <table:table-cell office:value-type="currency" office:value="-2337.7900000000009" table:formula="of:=IF([.D10]=0; 0; [.D10]-[.D11])" table:style-name="ce7">
            <text:p>-$2,338</text:p>
          </table:table-cell>
          <table:table-cell office:value-type="currency" office:value="13332.490000000002" table:formula="of:=IF([.E10]=0; 0; [.E10]-[.E11])" table:style-name="ce7">
            <text:p>$13,332</text:p>
          </table:table-cell>
          <table:table-cell office:value-type="currency" office:value="0" table:formula="of:=IF([.F10]=0; 0; [.F10]-[.F11])" table:style-name="ce7">
            <text:p>$0</text:p>
          </table:table-cell>
          <table:table-cell office:value-type="currency" office:value="0" table:formula="of:=IF([.G10]=0; 0; [.G10]-[.G11])" table:style-name="ce7">
            <text:p>$0</text:p>
          </table:table-cell>
          <table:table-cell office:value-type="currency" office:value="0" table:formula="of:=IF([.H10]=0; 0; [.H10]-[.H11])" table:style-name="ce7">
            <text:p>$0</text:p>
          </table:table-cell>
          <table:table-cell office:value-type="currency" office:value="0" table:formula="of:=IF([.I10]=0; 0; [.I10]-[.I11])" table:style-name="ce7">
            <text:p>$0</text:p>
          </table:table-cell>
          <table:table-cell office:value-type="currency" office:value="0" table:formula="of:=IF([.J10]=0; 0; [.J10]-[.J11])" table:style-name="ce7">
            <text:p>$0</text:p>
          </table:table-cell>
          <table:table-cell office:value-type="currency" office:value="0" table:formula="of:=IF([.K10]=0; 0; [.K10]-[.K11])" table:style-name="ce7">
            <text:p>$0</text:p>
          </table:table-cell>
          <table:table-cell office:value-type="currency" office:value="0" table:formula="of:=IF([.L10]=0; 0; [.L10]-[.L11])" table:style-name="ce7">
            <text:p>$0</text:p>
          </table:table-cell>
          <table:table-cell office:value-type="currency" office:value="0" table:formula="of:=IF([.M10]=0; 0; [.M10]-[.M11])" table:style-name="ce7">
            <text:p>$0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1">
            <text:p>YTD</text:p>
          </table:table-cell>
          <table:table-cell office:value-type="currency" office:value="16356.68" table:formula="of:=[.B10]" table:style-name="ce7">
            <text:p>$16,357</text:p>
          </table:table-cell>
          <table:table-cell office:value-type="currency" office:value="32713.360000000001" table:formula="of:=[.B13]+[.C10]" table:style-name="ce7">
            <text:p>$32,713</text:p>
          </table:table-cell>
          <table:table-cell office:value-type="currency" office:value="45375.57" table:formula="of:=[.C13]+[.D10]" table:style-name="ce7">
            <text:p>$45,376</text:p>
          </table:table-cell>
          <table:table-cell office:value-type="currency" office:value="73708.06" table:formula="of:=[.D13]+[.E10]" table:style-name="ce7">
            <text:p>$73,708</text:p>
          </table:table-cell>
          <table:table-cell office:value-type="currency" office:value="73708.06" table:formula="of:=[.E13]+[.F10]" table:style-name="ce7">
            <text:p>$73,708</text:p>
          </table:table-cell>
          <table:table-cell office:value-type="currency" office:value="73708.06" table:formula="of:=[.F13]+[.G10]" table:style-name="ce7">
            <text:p>$73,708</text:p>
          </table:table-cell>
          <table:table-cell office:value-type="currency" office:value="73708.06" table:formula="of:=[.G13]+[.H10]" table:style-name="ce7">
            <text:p>$73,708</text:p>
          </table:table-cell>
          <table:table-cell office:value-type="currency" office:value="73708.06" table:formula="of:=[.H13]+[.I10]" table:style-name="ce7">
            <text:p>$73,708</text:p>
          </table:table-cell>
          <table:table-cell office:value-type="currency" office:value="73708.06" table:formula="of:=[.I13]+[.J10]" table:style-name="ce7">
            <text:p>$73,708</text:p>
          </table:table-cell>
          <table:table-cell office:value-type="currency" office:value="73708.06" table:formula="of:=[.J13]+[.K10]" table:style-name="ce7">
            <text:p>$73,708</text:p>
          </table:table-cell>
          <table:table-cell office:value-type="currency" office:value="73708.06" table:formula="of:=[.K13]+[.L10]" table:style-name="ce7">
            <text:p>$73,708</text:p>
          </table:table-cell>
          <table:table-cell office:value-type="currency" office:value="73708.06" table:formula="of:=[.L13]+[.M10]" table:style-name="ce7">
            <text:p>$73,708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2">
            <text:p>YTD Variance to Plan</text:p>
          </table:table-cell>
          <table:table-cell office:value-type="currency" office:value="1356.6800000000003" table:formula="of:=[.B12]" table:style-name="ce12">
            <text:p>$1,357</text:p>
          </table:table-cell>
          <table:table-cell office:value-type="currency" office:value="2713.3600000000006" table:formula="of:=[.B14]+[.C12]" table:style-name="ce12">
            <text:p>$2,713</text:p>
          </table:table-cell>
          <table:table-cell office:value-type="currency" office:value="375.56999999999971" table:formula="of:=[.C14]+[.D12]" table:style-name="ce12">
            <text:p>$376</text:p>
          </table:table-cell>
          <table:table-cell office:value-type="currency" office:value="13708.060000000001" table:formula="of:=[.D14]+[.E12]" table:style-name="ce12">
            <text:p>$13,708</text:p>
          </table:table-cell>
          <table:table-cell office:value-type="currency" office:value="13708.060000000001" table:formula="of:=[.E14]+[.F12]" table:style-name="ce12">
            <text:p>$13,708</text:p>
          </table:table-cell>
          <table:table-cell office:value-type="currency" office:value="13708.060000000001" table:formula="of:=[.F14]+[.G12]" table:style-name="ce12">
            <text:p>$13,708</text:p>
          </table:table-cell>
          <table:table-cell office:value-type="currency" office:value="13708.060000000001" table:formula="of:=[.G14]+[.H12]" table:style-name="ce12">
            <text:p>$13,708</text:p>
          </table:table-cell>
          <table:table-cell office:value-type="currency" office:value="13708.060000000001" table:formula="of:=[.H14]+[.I12]" table:style-name="ce12">
            <text:p>$13,708</text:p>
          </table:table-cell>
          <table:table-cell office:value-type="currency" office:value="13708.060000000001" table:formula="of:=[.I14]+[.J12]" table:style-name="ce12">
            <text:p>$13,708</text:p>
          </table:table-cell>
          <table:table-cell office:value-type="currency" office:value="13708.060000000001" table:formula="of:=[.J14]+[.K12]" table:style-name="ce12">
            <text:p>$13,708</text:p>
          </table:table-cell>
          <table:table-cell office:value-type="currency" office:value="13708.060000000001" table:formula="of:=[.K14]+[.L12]" table:style-name="ce12">
            <text:p>$13,708</text:p>
          </table:table-cell>
          <table:table-cell office:value-type="currency" office:value="13708.060000000001" table:formula="of:=[.L14]+[.M12]" table:style-name="ce12">
            <text:p>$13,708</text:p>
          </table:table-cell>
          <table:table-cell table:style-name="ce2"/>
          <table:table-cell table:number-columns-repeated="16370" table:style-name="ce1"/>
        </table:table-row>
        <table:table-row table:number-rows-repeated="2" table:style-name="ro1">
          <table:table-cell table:number-columns-repeated="14" table:style-name="ce2"/>
          <table:table-cell table:number-columns-repeated="16370" table:style-name="ce1"/>
        </table:table-row>
        <table:table-row table:number-rows-repeated="980" table:style-name="ro1">
          <table:table-cell table:number-columns-repeated="16384"/>
        </table:table-row>
        <table:table-row table:number-rows-repeated="104758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P0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currency-style style:name="N37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7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dc:creator>Turan Furkan Topak</dc:creator>
    <dc:date>2026-05-26T23:14:20Z</dc:date>
    <meta:editing-cycles>9</meta:editing-cycles>
    <meta:editing-duration>PT192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tr" fo:country="T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628031496063pt" svg:width="453.3451181102362pt" chart:style-name="Crt0">
        <chart:title chart:style-name="CT00">
          <text:p text:style-name="a0" text:class-names="" text:cond-style-name="">2026 Burn Trackin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9:.$M$9"/>
          </chart:axis>
          <chart:series chart:label-cell-address="Sheet1.$A$10" chart:values-cell-range-address="Sheet1.$B$10:.$M$10" chart:class="chart:bar" chart:attached-axis="primary-y" chart:style-name="G0S0">
            <chart:data-point chart:repeated="12"/>
          </chart:series>
          <chart:series chart:label-cell-address="Sheet1.$A$11" chart:values-cell-range-address="Sheet1.$B$11:.$M$11" chart:class="chart:bar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