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Liberation Sans" style:font-name-asian="Liberation Sans" style:font-name-complex="Liberation Sans" fo:font-size="11pt" style:font-size-asian="11pt" style:font-size-complex="11pt"/>
    </style:style>
    <style:style style:name="ce3" style:family="table-cell" style:parent-style-name="Default" style:data-style-name="N0">
      <style:table-cell-properties style:vertical-align="automatic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e4" style:family="table-cell" style:parent-style-name="Default" style:data-style-name="N3">
      <style:table-cell-properties style:vertical-align="automatic" fo:wrap-option="wrap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e5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center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e6" style:family="table-cell" style:parent-style-name="Default" style:data-style-name="N0">
      <style:table-cell-properties fo:border="thin solid #000000" style:vertical-align="automatic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e7" style:family="table-cell" style:parent-style-name="Default" style:data-style-name="N37">
      <style:table-cell-properties fo:border="thin solid #000000" style:vertical-align="automatic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e8" style:family="table-cell" style:parent-style-name="Default" style:data-style-name="N2">
      <style:table-cell-properties style:vertical-align="automatic" fo:wrap-option="wrap"/>
    </style:style>
    <style:style style:name="ce9" style:family="table-cell" style:parent-style-name="Default" style:data-style-name="N37">
      <style:table-cell-properties style:vertical-align="automatic" fo:wrap-option="wrap"/>
    </style:style>
    <style:style style:name="ce10" style:family="table-cell" style:parent-style-name="Default" style:data-style-name="N36"/>
    <style:style style:name="ce11" style:family="table-cell" style:parent-style-name="Default" style:data-style-name="N0">
      <style:table-cell-properties fo:border="thin solid #000000" style:vertical-align="automatic" fo:background-color="#DDDDDD"/>
      <style:text-properties style:font-name="Liberation Sans" style:font-name-asian="Liberation Sans" style:font-name-complex="Liberation Sans" fo:font-size="11pt" style:font-size-asian="11pt" style:font-size-complex="11pt" fo:font-weight="bold" style:font-weight-asian="bold" style:font-weight-complex="bold"/>
    </style:style>
    <style:style style:name="ce12" style:family="table-cell" style:parent-style-name="Default" style:data-style-name="N37">
      <style:text-properties style:font-name="Liberation Sans" style:font-name-asian="Liberation Sans" style:font-name-complex="Liberation Sans" fo:font-size="11pt" style:font-size-asian="11pt" style:font-size-complex="11pt"/>
    </style:style>
    <style:style style:name="ce1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e14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center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o1" style:family="table-column">
      <style:table-column-properties fo:break-before="auto" style:column-width="4.471458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487083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6.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shapes>
          <draw:frame draw:z-index="1" draw:id="id0" draw:style-name="a0" draw:name="Chart 1" svg:x="1.81102in" svg:y="4.28543in" svg:width="6.29646in" svg:height="3.55039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1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11" table:default-cell-style-name="ce1"/>
        <table:table-column table:style-name="co5" table:number-columns-repeated="998" table:default-cell-style-name="ce1"/>
        <table:table-column table:style-name="co3" table:number-columns-repeated="15360" table:default-cell-style-name="ce1"/>
        <table:table-row table:number-rows-repeated="3" table:style-name="ro1">
          <table:table-cell table:number-columns-repeated="14" table:style-name="ce2"/>
          <table:table-cell table:number-columns-repeated="16370" table:style-name="ce1"/>
        </table:table-row>
        <table:table-row table:style-name="ro1">
          <table:table-cell table:style-name="ce3"/>
          <table:table-cell table:number-columns-repeated="13" table:style-name="ce2"/>
          <table:table-cell table:number-columns-repeated="16370" table:style-name="ce1"/>
        </table:table-row>
        <table:table-row table:style-name="ro2">
          <table:table-cell table:number-columns-repeated="14" table:style-name="ce2"/>
          <table:table-cell table:number-columns-repeated="16370" table:style-name="ce1"/>
        </table:table-row>
        <table:table-row table:style-name="ro1">
          <table:table-cell table:style-name="ce3"/>
          <table:table-cell table:style-name="ce4"/>
          <table:table-cell table:number-columns-repeated="2" table:style-name="ce3"/>
          <table:table-cell office:value-type="float" office:value="180000" table:style-name="ce3">
            <text:p>180000</text:p>
          </table:table-cell>
          <table:table-cell office:value-type="string" table:style-name="ce3">
            <text:p>(rounded)</text:p>
          </table:table-cell>
          <table:table-cell table:number-columns-repeated="7" table:style-name="ce3"/>
          <table:table-cell table:style-name="ce2"/>
          <table:table-cell table:number-columns-repeated="16370" table:style-name="ce1"/>
        </table:table-row>
        <table:table-row table:style-name="ro1">
          <table:table-cell table:number-columns-repeated="13" table:style-name="ce3"/>
          <table:table-cell table:style-name="ce2"/>
          <table:table-cell office:value-type="string" table:style-name="ce1">
            <text:p>avg</text:p>
          </table:table-cell>
          <table:table-cell table:number-columns-repeated="16369"/>
        </table:table-row>
        <table:table-row table:style-name="ro1">
          <table:table-cell table:style-name="ce3"/>
          <table:table-cell office:value-type="string" table:number-columns-spanned="3" table:number-rows-spanned="1" table:style-name="ce13">
            <text:p>Q1</text:p>
          </table:table-cell>
          <table:covered-table-cell table:number-columns-repeated="2"/>
          <table:table-cell office:value-type="string" table:number-columns-spanned="3" table:number-rows-spanned="1" table:style-name="ce14">
            <text:p>Q2</text:p>
          </table:table-cell>
          <table:covered-table-cell table:number-columns-repeated="2"/>
          <table:table-cell office:value-type="string" table:number-columns-spanned="3" table:number-rows-spanned="1" table:style-name="ce13">
            <text:p>Q3</text:p>
          </table:table-cell>
          <table:covered-table-cell table:number-columns-repeated="2"/>
          <table:table-cell office:value-type="string" table:number-columns-spanned="3" table:number-rows-spanned="1" table:style-name="ce14">
            <text:p>Q4</text:p>
          </table:table-cell>
          <table:covered-table-cell table:number-columns-repeated="2"/>
          <table:table-cell table:style-name="ce2"/>
          <table:table-cell table:number-columns-repeated="16370" table:style-name="ce1"/>
        </table:table-row>
        <table:table-row table:style-name="ro1">
          <table:table-cell table:style-name="ce3"/>
          <table:table-cell office:value-type="string" table:style-name="ce5">
            <text:p>Jan</text:p>
          </table:table-cell>
          <table:table-cell office:value-type="string" table:style-name="ce5">
            <text:p>Feb</text:p>
          </table:table-cell>
          <table:table-cell office:value-type="string" table:style-name="ce5">
            <text:p>Mar</text:p>
          </table:table-cell>
          <table:table-cell office:value-type="string" table:style-name="ce5">
            <text:p>Apr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Jun</text:p>
          </table:table-cell>
          <table:table-cell office:value-type="string" table:style-name="ce5">
            <text:p>Jul</text:p>
          </table:table-cell>
          <table:table-cell office:value-type="string" table:style-name="ce5">
            <text:p>Aug</text:p>
          </table:table-cell>
          <table:table-cell office:value-type="string" table:style-name="ce5">
            <text:p>Sep</text:p>
          </table:table-cell>
          <table:table-cell office:value-type="string" table:style-name="ce5">
            <text:p>Oct</text:p>
          </table:table-cell>
          <table:table-cell office:value-type="string" table:style-name="ce5">
            <text:p>Nov</text:p>
          </table:table-cell>
          <table:table-cell office:value-type="string" table:style-name="ce5">
            <text:p>Dec</text:p>
          </table:table-cell>
          <table:table-cell table:style-name="ce2"/>
          <table:table-cell table:number-columns-repeated="16370" table:style-name="ce1"/>
        </table:table-row>
        <table:table-row table:style-name="ro1">
          <table:table-cell office:value-type="string" table:style-name="ce6">
            <text:p>Actual</text:p>
          </table:table-cell>
          <table:table-cell office:value-type="currency" office:value="19405.650000000001" table:style-name="ce7">
            <text:p>$19,406</text:p>
          </table:table-cell>
          <table:table-cell office:value-type="currency" office:value="30534.46" table:style-name="ce7">
            <text:p>$30,534</text:p>
          </table:table-cell>
          <table:table-cell office:value-type="float" office:value="14468.41" table:style-name="ce8">
            <text:p>14468.41</text:p>
          </table:table-cell>
          <table:table-cell office:value-type="currency" office:value="34338.39" table:style-name="ce7">
            <text:p>$34,338</text:p>
          </table:table-cell>
          <table:table-cell office:value-type="currency" office:value="15721.63" table:style-name="ce9">
            <text:p>$15,722</text:p>
          </table:table-cell>
          <table:table-cell table:number-columns-repeated="7" table:style-name="ce7"/>
          <table:table-cell table:style-name="ce2"/>
          <table:table-cell office:value-type="currency" office:value="22893.708000000002" table:formula="of:=SUM([.B10:.M10])/COUNT([.B10:.M10])" table:style-name="ce10">
            <text:p>$22,893.71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Forecast</text:p>
          </table:table-cell>
          <table:table-cell office:value-type="currency" office:value="15000" table:formula="of:=[.$E$6]/12" table:style-name="ce7">
            <text:p>$15,000</text:p>
          </table:table-cell>
          <table:table-cell office:value-type="currency" office:value="15000" table:formula="of:=[.$E$6]/12" table:style-name="ce7">
            <text:p>$15,000</text:p>
          </table:table-cell>
          <table:table-cell office:value-type="currency" office:value="15000" table:formula="of:=[.$E$6]/12" table:style-name="ce7">
            <text:p>$15,000</text:p>
          </table:table-cell>
          <table:table-cell office:value-type="currency" office:value="15000" table:formula="of:=[.$E$6]/12" table:style-name="ce7">
            <text:p>$15,000</text:p>
          </table:table-cell>
          <table:table-cell office:value-type="currency" office:value="15000" table:formula="of:=[.$E$6]/12" table:style-name="ce7">
            <text:p>$15,000</text:p>
          </table:table-cell>
          <table:table-cell office:value-type="currency" office:value="15000" table:formula="of:=[.$E$6]/12" table:style-name="ce7">
            <text:p>$15,000</text:p>
          </table:table-cell>
          <table:table-cell office:value-type="currency" office:value="15000" table:formula="of:=[.$E$6]/12" table:style-name="ce7">
            <text:p>$15,000</text:p>
          </table:table-cell>
          <table:table-cell office:value-type="currency" office:value="15000" table:formula="of:=[.$E$6]/12" table:style-name="ce7">
            <text:p>$15,000</text:p>
          </table:table-cell>
          <table:table-cell office:value-type="currency" office:value="15000" table:formula="of:=[.$E$6]/12" table:style-name="ce7">
            <text:p>$15,000</text:p>
          </table:table-cell>
          <table:table-cell office:value-type="currency" office:value="15000" table:formula="of:=[.$E$6]/12" table:style-name="ce7">
            <text:p>$15,000</text:p>
          </table:table-cell>
          <table:table-cell office:value-type="currency" office:value="15000" table:formula="of:=[.$E$6]/12" table:style-name="ce7">
            <text:p>$15,000</text:p>
          </table:table-cell>
          <table:table-cell office:value-type="currency" office:value="15000" table:formula="of:=[.$E$6]/12" table:style-name="ce7">
            <text:p>$15,000</text:p>
          </table:table-cell>
          <table:table-cell table:style-name="ce2"/>
          <table:table-cell table:number-columns-repeated="16370" table:style-name="ce1"/>
        </table:table-row>
        <table:table-row table:style-name="ro1">
          <table:table-cell office:value-type="string" table:style-name="ce11">
            <text:p>Variance to Plan</text:p>
          </table:table-cell>
          <table:table-cell office:value-type="currency" office:value="4405.6500000000015" table:formula="of:=[.B10]-[.B11]" table:style-name="ce7">
            <text:p>$4,406</text:p>
          </table:table-cell>
          <table:table-cell office:value-type="currency" office:value="15534.46" table:formula="of:=IF([.C10]=0; 0; [.C10]-[.C11])" table:style-name="ce7">
            <text:p>$15,534</text:p>
          </table:table-cell>
          <table:table-cell office:value-type="currency" office:value="-531.59000000000015" table:formula="of:=IF([.D10]=0; 0; [.D10]-[.D11])" table:style-name="ce7">
            <text:p>-$532</text:p>
          </table:table-cell>
          <table:table-cell office:value-type="currency" office:value="19338.39" table:formula="of:=IF([.E10]=0; 0; [.E10]-[.E11])" table:style-name="ce7">
            <text:p>$19,338</text:p>
          </table:table-cell>
          <table:table-cell office:value-type="currency" office:value="721.6299999999992" table:formula="of:=IF([.F10]=0; 0; [.F10]-[.F11])" table:style-name="ce7">
            <text:p>$722</text:p>
          </table:table-cell>
          <table:table-cell office:value-type="currency" office:value="0" table:formula="of:=IF([.G10]=0; 0; [.G10]-[.G11])" table:style-name="ce7">
            <text:p>$0</text:p>
          </table:table-cell>
          <table:table-cell office:value-type="currency" office:value="0" table:formula="of:=IF([.H10]=0; 0; [.H10]-[.H11])" table:style-name="ce7">
            <text:p>$0</text:p>
          </table:table-cell>
          <table:table-cell office:value-type="currency" office:value="0" table:formula="of:=IF([.I10]=0; 0; [.I10]-[.I11])" table:style-name="ce7">
            <text:p>$0</text:p>
          </table:table-cell>
          <table:table-cell office:value-type="currency" office:value="0" table:formula="of:=IF([.J10]=0; 0; [.J10]-[.J11])" table:style-name="ce7">
            <text:p>$0</text:p>
          </table:table-cell>
          <table:table-cell office:value-type="currency" office:value="0" table:formula="of:=IF([.K10]=0; 0; [.K10]-[.K11])" table:style-name="ce7">
            <text:p>$0</text:p>
          </table:table-cell>
          <table:table-cell office:value-type="currency" office:value="0" table:formula="of:=IF([.L10]=0; 0; [.L10]-[.L11])" table:style-name="ce7">
            <text:p>$0</text:p>
          </table:table-cell>
          <table:table-cell office:value-type="currency" office:value="0" table:formula="of:=IF([.M10]=0; 0; [.M10]-[.M11])" table:style-name="ce7">
            <text:p>$0</text:p>
          </table:table-cell>
          <table:table-cell table:style-name="ce2"/>
          <table:table-cell table:number-columns-repeated="16370" table:style-name="ce1"/>
        </table:table-row>
        <table:table-row table:style-name="ro1">
          <table:table-cell office:value-type="string" table:style-name="ce11">
            <text:p>YTD</text:p>
          </table:table-cell>
          <table:table-cell office:value-type="currency" office:value="19405.650000000001" table:formula="of:=[.B10]" table:style-name="ce7">
            <text:p>$19,406</text:p>
          </table:table-cell>
          <table:table-cell office:value-type="currency" office:value="49940.11" table:formula="of:=[.B13]+[.C10]" table:style-name="ce7">
            <text:p>$49,940</text:p>
          </table:table-cell>
          <table:table-cell office:value-type="currency" office:value="64408.520000000004" table:formula="of:=[.C13]+[.D10]" table:style-name="ce7">
            <text:p>$64,409</text:p>
          </table:table-cell>
          <table:table-cell office:value-type="currency" office:value="98746.91" table:formula="of:=[.D13]+[.E10]" table:style-name="ce7">
            <text:p>$98,747</text:p>
          </table:table-cell>
          <table:table-cell office:value-type="currency" office:value="114468.54000000001" table:formula="of:=[.E13]+[.F10]" table:style-name="ce7">
            <text:p>$114,469</text:p>
          </table:table-cell>
          <table:table-cell office:value-type="currency" office:value="114468.54000000001" table:formula="of:=[.F13]+[.G10]" table:style-name="ce7">
            <text:p>$114,469</text:p>
          </table:table-cell>
          <table:table-cell office:value-type="currency" office:value="114468.54000000001" table:formula="of:=[.G13]+[.H10]" table:style-name="ce7">
            <text:p>$114,469</text:p>
          </table:table-cell>
          <table:table-cell office:value-type="currency" office:value="114468.54000000001" table:formula="of:=[.H13]+[.I10]" table:style-name="ce7">
            <text:p>$114,469</text:p>
          </table:table-cell>
          <table:table-cell office:value-type="currency" office:value="114468.54000000001" table:formula="of:=[.I13]+[.J10]" table:style-name="ce7">
            <text:p>$114,469</text:p>
          </table:table-cell>
          <table:table-cell office:value-type="currency" office:value="114468.54000000001" table:formula="of:=[.J13]+[.K10]" table:style-name="ce7">
            <text:p>$114,469</text:p>
          </table:table-cell>
          <table:table-cell office:value-type="currency" office:value="114468.54000000001" table:formula="of:=[.K13]+[.L10]" table:style-name="ce7">
            <text:p>$114,469</text:p>
          </table:table-cell>
          <table:table-cell office:value-type="currency" office:value="114468.54000000001" table:formula="of:=[.L13]+[.M10]" table:style-name="ce7">
            <text:p>$114,469</text:p>
          </table:table-cell>
          <table:table-cell table:style-name="ce2"/>
          <table:table-cell table:number-columns-repeated="16370" table:style-name="ce1"/>
        </table:table-row>
        <table:table-row table:style-name="ro1">
          <table:table-cell office:value-type="string" table:style-name="ce2">
            <text:p>YTD Variance to Plan</text:p>
          </table:table-cell>
          <table:table-cell office:value-type="currency" office:value="4405.6500000000015" table:formula="of:=[.B12]" table:style-name="ce12">
            <text:p>$4,406</text:p>
          </table:table-cell>
          <table:table-cell office:value-type="currency" office:value="19940.11" table:formula="of:=[.B14]+[.C12]" table:style-name="ce12">
            <text:p>$19,940</text:p>
          </table:table-cell>
          <table:table-cell office:value-type="currency" office:value="19408.52" table:formula="of:=[.C14]+[.D12]" table:style-name="ce12">
            <text:p>$19,409</text:p>
          </table:table-cell>
          <table:table-cell office:value-type="currency" office:value="38746.910000000003" table:formula="of:=[.D14]+[.E12]" table:style-name="ce12">
            <text:p>$38,747</text:p>
          </table:table-cell>
          <table:table-cell office:value-type="currency" office:value="39468.54" table:formula="of:=[.E14]+[.F12]" table:style-name="ce12">
            <text:p>$39,469</text:p>
          </table:table-cell>
          <table:table-cell office:value-type="currency" office:value="39468.54" table:formula="of:=[.F14]+[.G12]" table:style-name="ce12">
            <text:p>$39,469</text:p>
          </table:table-cell>
          <table:table-cell office:value-type="currency" office:value="39468.54" table:formula="of:=[.G14]+[.H12]" table:style-name="ce12">
            <text:p>$39,469</text:p>
          </table:table-cell>
          <table:table-cell office:value-type="currency" office:value="39468.54" table:formula="of:=[.H14]+[.I12]" table:style-name="ce12">
            <text:p>$39,469</text:p>
          </table:table-cell>
          <table:table-cell office:value-type="currency" office:value="39468.54" table:formula="of:=[.I14]+[.J12]" table:style-name="ce12">
            <text:p>$39,469</text:p>
          </table:table-cell>
          <table:table-cell office:value-type="currency" office:value="39468.54" table:formula="of:=[.J14]+[.K12]" table:style-name="ce12">
            <text:p>$39,469</text:p>
          </table:table-cell>
          <table:table-cell office:value-type="currency" office:value="39468.54" table:formula="of:=[.K14]+[.L12]" table:style-name="ce12">
            <text:p>$39,469</text:p>
          </table:table-cell>
          <table:table-cell office:value-type="currency" office:value="39468.54" table:formula="of:=[.L14]+[.M12]" table:style-name="ce12">
            <text:p>$39,469</text:p>
          </table:table-cell>
          <table:table-cell table:style-name="ce2"/>
          <table:table-cell table:number-columns-repeated="16370" table:style-name="ce1"/>
        </table:table-row>
        <table:table-row table:number-rows-repeated="2" table:style-name="ro1">
          <table:table-cell table:number-columns-repeated="14" table:style-name="ce2"/>
          <table:table-cell table:number-columns-repeated="16370" table:style-name="ce1"/>
        </table:table-row>
        <table:table-row table:number-rows-repeated="980" table:style-name="ro1">
          <table:table-cell table:number-columns-repeated="16384"/>
        </table:table-row>
        <table:table-row table:number-rows-repeated="104758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currency-style style:name="N36P0" number:language="en" number:country="CA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36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36P0"/>
    </number:currency-style>
    <number:currency-style style:name="N37P0" number:language="en" number:country="CA">
      <number:currency-symbol number:language="en" number:country="CA">$</number:currency-symbol>
      <number:number number:decimal-places="0" number:min-decimal-places="0" number:min-integer-digits="1" number:grouping="true"/>
    </number:currency-style>
    <number:currency-style style:name="N37" number:language="en" number:country="CA">
      <style:text-properties fo:color="#FF0000"/>
      <number:text>-</number:text>
      <number:currency-symbol number:language="en" number:country="CA">$</number:currency-symbol>
      <number:number number:decimal-places="0" number:min-decimal-places="0" number:min-integer-digits="1" number:grouping="true"/>
      <style:map style:condition="value()&gt;=0" style:apply-style-name="N37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78740157480315in" fo:margin-right="0.7874015748031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30026</meta:generator>
    <dc:creator>Turan Furkan Topak</dc:creator>
    <dc:date>2026-06-25T14:34:32Z</dc:date>
    <meta:editing-cycles>9</meta:editing-cycles>
    <meta:editing-duration>PT1926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1389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tr" fo:country="T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ff420e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55.628031496063pt" svg:width="453.3451181102362pt" chart:style-name="Crt0">
        <chart:title chart:style-name="CT00">
          <text:p text:style-name="a0" text:class-names="" text:cond-style-name="">2026 Burn Tracking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B$9:.$M$9"/>
          </chart:axis>
          <chart:series chart:label-cell-address="Sheet1.$A$10" chart:values-cell-range-address="Sheet1.$B$10:.$M$10" chart:class="chart:bar" chart:attached-axis="primary-y" chart:style-name="G0S0">
            <chart:data-point chart:repeated="12"/>
          </chart:series>
          <chart:series chart:label-cell-address="Sheet1.$A$11" chart:values-cell-range-address="Sheet1.$B$11:.$M$11" chart:class="chart:bar" chart:attached-axis="primary-y" chart:style-name="G0S1">
            <chart:data-point chart:repeated="1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