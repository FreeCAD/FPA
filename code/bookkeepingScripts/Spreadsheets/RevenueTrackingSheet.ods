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ans" style:font-name-asian="Liberation Sans" style:font-name-complex="Liberation Sans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4" style:family="table-cell" style:parent-style-name="Default" style:data-style-name="N3">
      <style:table-cell-properties style:vertical-align="automatic" fo:wrap-option="wrap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6" style:family="table-cell" style:parent-style-name="Default" style:data-style-name="N0">
      <style:table-cell-properties fo:border="thin solid #000000"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7" style:family="table-cell" style:parent-style-name="Default" style:data-style-name="N37">
      <style:table-cell-properties fo:border="thin solid #000000"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8" style:family="table-cell" style:parent-style-name="Default" style:data-style-name="N2">
      <style:table-cell-properties style:vertical-align="automatic" fo:wrap-option="wrap"/>
    </style:style>
    <style:style style:name="ce9" style:family="table-cell" style:parent-style-name="Default" style:data-style-name="N37">
      <style:table-cell-properties style:vertical-align="automatic" fo:wrap-option="wrap"/>
    </style:style>
    <style:style style:name="ce10" style:family="table-cell" style:parent-style-name="Default" style:data-style-name="N36"/>
    <style:style style:name="ce11" style:family="table-cell" style:parent-style-name="Default" style:data-style-name="N0">
      <style:table-cell-properties fo:border="thin solid #000000" style:vertical-align="automatic" fo:background-color="#DDDDDD"/>
      <style:text-properties style:font-name="Liberation Sans" style:font-name-asian="Liberation Sans" style:font-name-complex="Liberation Sans"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37">
      <style:table-cell-properties style:vertical-align="automatic" fo:wrap-option="wrap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3" style:family="table-cell" style:parent-style-name="Default" style:data-style-name="N37"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48708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1.81102in" svg:y="4.28543in" svg:width="6.29646in" svg:height="3.5503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1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1" table:default-cell-style-name="ce1"/>
        <table:table-column table:style-name="co5" table:number-columns-repeated="998" table:default-cell-style-name="ce1"/>
        <table:table-column table:style-name="co3" table:number-columns-repeated="15360" table:default-cell-style-name="ce1"/>
        <table:table-row table:number-rows-repeated="3" table:style-name="ro1">
          <table:table-cell table:number-columns-repeated="14" table:style-name="ce2"/>
          <table:table-cell table:number-columns-repeated="16370" table:style-name="ce1"/>
        </table:table-row>
        <table:table-row table:style-name="ro1">
          <table:table-cell office:value-type="string" table:style-name="ce3">
            <text:p>2025 Revenue Tracking Sheet</text:p>
          </table:table-cell>
          <table:table-cell table:number-columns-repeated="13" table:style-name="ce2"/>
          <table:table-cell table:number-columns-repeated="16370" table:style-name="ce1"/>
        </table:table-row>
        <table:table-row table:style-name="ro1">
          <table:table-cell table:number-columns-repeated="14" table:style-name="ce2"/>
          <table:table-cell table:number-columns-repeated="16370" table:style-name="ce1"/>
        </table:table-row>
        <table:table-row table:style-name="ro1">
          <table:table-cell office:value-type="string" table:style-name="ce3">
            <text:p>2024 Donation Actual</text:p>
          </table:table-cell>
          <table:table-cell office:value-type="float" office:value="185685.5" table:style-name="ce4">
            <text:p>185,686</text:p>
          </table:table-cell>
          <table:table-cell office:value-type="string" table:style-name="ce3">
            <text:p>(includes OndselOnward, GSOC and KiCad)</text:p>
          </table:table-cell>
          <table:table-cell table:number-columns-repeated="10" table:style-name="ce3"/>
          <table:table-cell table:style-name="ce2"/>
          <table:table-cell table:number-columns-repeated="16370" table:style-name="ce1"/>
        </table:table-row>
        <table:table-row table:style-name="ro1">
          <table:table-cell table:style-name="ce3"/>
          <table:table-cell office:value-type="float" office:value="144828.15900000001" table:style-name="ce4">
            <text:p>144,828</text:p>
          </table:table-cell>
          <table:table-cell office:value-type="string" table:style-name="ce3">
            <text:p>(net of extrordinary items)</text:p>
          </table:table-cell>
          <table:table-cell table:number-columns-repeated="10" table:style-name="ce3"/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3">
            <text:p>2025 Donation Forecast</text:p>
          </table:table-cell>
          <table:table-cell office:value-type="float" office:value="159310.97490000003" table:formula="of:=[.B7]*1.1" table:style-name="ce4">
            <text:p>159,311</text:p>
          </table:table-cell>
          <table:table-cell office:value-type="string" table:style-name="ce3">
            <text:p>(2024 net + 10%)</text:p>
          </table:table-cell>
          <table:table-cell table:style-name="ce3"/>
          <table:table-cell office:value-type="float" office:value="160000" table:style-name="ce3">
            <text:p>160000</text:p>
          </table:table-cell>
          <table:table-cell office:value-type="string" table:style-name="ce3">
            <text:p>(rounded)</text:p>
          </table:table-cell>
          <table:table-cell table:number-columns-repeated="7" table:style-name="ce3"/>
          <table:table-cell table:style-name="ce2"/>
          <table:table-cell table:number-columns-repeated="16370" table:style-name="ce1"/>
        </table:table-row>
        <table:table-row table:style-name="ro1">
          <table:table-cell table:number-columns-repeated="13" table:style-name="ce3"/>
          <table:table-cell table:style-name="ce2"/>
          <table:table-cell office:value-type="string" table:style-name="ce1">
            <text:p>avg</text:p>
          </table:table-cell>
          <table:table-cell table:number-columns-repeated="16369"/>
        </table:table-row>
        <table:table-row table:style-name="ro1">
          <table:table-cell table:style-name="ce3"/>
          <table:table-cell office:value-type="string" table:number-columns-spanned="3" table:number-rows-spanned="1" table:style-name="ce14">
            <text:p>Q1</text:p>
          </table:table-cell>
          <table:covered-table-cell table:number-columns-repeated="2"/>
          <table:table-cell office:value-type="string" table:number-columns-spanned="3" table:number-rows-spanned="1" table:style-name="ce15">
            <text:p>Q2</text:p>
          </table:table-cell>
          <table:covered-table-cell table:number-columns-repeated="2"/>
          <table:table-cell office:value-type="string" table:number-columns-spanned="3" table:number-rows-spanned="1" table:style-name="ce14">
            <text:p>Q3</text:p>
          </table:table-cell>
          <table:covered-table-cell table:number-columns-repeated="2"/>
          <table:table-cell office:value-type="string" table:number-columns-spanned="3" table:number-rows-spanned="1" table:style-name="ce15">
            <text:p>Q4</text:p>
          </table:table-cell>
          <table:covered-table-cell table:number-columns-repeated="2"/>
          <table:table-cell table:style-name="ce2"/>
          <table:table-cell table:number-columns-repeated="16370" table:style-name="ce1"/>
        </table:table-row>
        <table:table-row table:style-name="ro1">
          <table:table-cell table:style-name="ce3"/>
          <table:table-cell office:value-type="string" table:style-name="ce5">
            <text:p>Jan</text:p>
          </table:table-cell>
          <table:table-cell office:value-type="string" table:style-name="ce5">
            <text:p>Feb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Apr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n</text:p>
          </table:table-cell>
          <table:table-cell office:value-type="string" table:style-name="ce5">
            <text:p>Jul</text:p>
          </table:table-cell>
          <table:table-cell office:value-type="string" table:style-name="ce5">
            <text:p>Aug</text:p>
          </table:table-cell>
          <table:table-cell office:value-type="string" table:style-name="ce5">
            <text:p>Sep</text:p>
          </table:table-cell>
          <table:table-cell office:value-type="string" table:style-name="ce5">
            <text:p>Oct</text:p>
          </table:table-cell>
          <table:table-cell office:value-type="string" table:style-name="ce5">
            <text:p>Nov</text:p>
          </table:table-cell>
          <table:table-cell office:value-type="string" table:style-name="ce5">
            <text:p>Dec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6">
            <text:p>Actual</text:p>
          </table:table-cell>
          <table:table-cell office:value-type="currency" office:value="15357.76" table:style-name="ce7">
            <text:p>$15,358</text:p>
          </table:table-cell>
          <table:table-cell office:value-type="currency" office:value="14593.02" table:style-name="ce7">
            <text:p>$14,593</text:p>
          </table:table-cell>
          <table:table-cell office:value-type="float" office:value="25125.759999999998" table:style-name="ce8">
            <text:p>25125.76</text:p>
          </table:table-cell>
          <table:table-cell office:value-type="currency" office:value="21006.36" table:style-name="ce7">
            <text:p>$21,006</text:p>
          </table:table-cell>
          <table:table-cell office:value-type="currency" office:value="14229.38" table:style-name="ce9">
            <text:p>$14,229</text:p>
          </table:table-cell>
          <table:table-cell office:value-type="currency" office:value="13349.18" table:style-name="ce7">
            <text:p>$13,349</text:p>
          </table:table-cell>
          <table:table-cell table:number-columns-repeated="6" table:style-name="ce7"/>
          <table:table-cell table:style-name="ce2"/>
          <table:table-cell office:value-type="currency" office:value="17276.91" table:formula="of:=SUM([.B12:.M12])/COUNT([.B12:.M12])" table:style-name="ce10">
            <text:p>$17,276.91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orecast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11">
            <text:p>Variance to Plan</text:p>
          </table:table-cell>
          <table:table-cell office:value-type="currency" office:value="2024.4266666666663" table:formula="of:=[.B12]-[.B13]" table:style-name="ce7">
            <text:p>$2,024</text:p>
          </table:table-cell>
          <table:table-cell office:value-type="currency" office:value="1259.6866666666665" table:formula="of:=IF([.C12]=0; 0; [.C12]-[.C13])" table:style-name="ce7">
            <text:p>$1,260</text:p>
          </table:table-cell>
          <table:table-cell office:value-type="currency" office:value="11792.426666666664" table:formula="of:=IF([.D12]=0; 0; [.D12]-[.D13])" table:style-name="ce7">
            <text:p>$11,792</text:p>
          </table:table-cell>
          <table:table-cell office:value-type="currency" office:value="7673.0266666666666" table:formula="of:=IF([.E12]=0; 0; [.E12]-[.E13])" table:style-name="ce7">
            <text:p>$7,673</text:p>
          </table:table-cell>
          <table:table-cell office:value-type="currency" office:value="896.04666666666526" table:formula="of:=IF([.F12]=0; 0; [.F12]-[.F13])" table:style-name="ce7">
            <text:p>$896</text:p>
          </table:table-cell>
          <table:table-cell office:value-type="currency" office:value="15.846666666666351" table:formula="of:=IF([.G12]=0; 0; [.G12]-[.G13])" table:style-name="ce7">
            <text:p>$16</text:p>
          </table:table-cell>
          <table:table-cell office:value-type="currency" office:value="0" table:formula="of:=IF([.H12]=0; 0; [.H12]-[.H13])" table:style-name="ce7">
            <text:p>$0</text:p>
          </table:table-cell>
          <table:table-cell office:value-type="currency" office:value="0" table:formula="of:=IF([.I12]=0; 0; [.I12]-[.I13])" table:style-name="ce7">
            <text:p>$0</text:p>
          </table:table-cell>
          <table:table-cell office:value-type="currency" office:value="0" table:formula="of:=IF([.J12]=0; 0; [.J12]-[.J13])" table:style-name="ce7">
            <text:p>$0</text:p>
          </table:table-cell>
          <table:table-cell office:value-type="currency" office:value="0" table:formula="of:=IF([.K12]=0; 0; [.K12]-[.K13])" table:style-name="ce7">
            <text:p>$0</text:p>
          </table:table-cell>
          <table:table-cell office:value-type="currency" office:value="0" table:formula="of:=IF([.L12]=0; 0; [.L12]-[.L13])" table:style-name="ce7">
            <text:p>$0</text:p>
          </table:table-cell>
          <table:table-cell office:value-type="currency" office:value="0" table:formula="of:=IF([.M12]=0; 0; [.M12]-[.M13])" table:style-name="ce7">
            <text:p>$0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6">
            <text:p>2025 Actual</text:p>
          </table:table-cell>
          <table:table-cell office:value-type="currency" office:value="20074.14" table:style-name="ce7">
            <text:p>$20,074</text:p>
          </table:table-cell>
          <table:table-cell office:value-type="currency" office:value="21255.3" table:style-name="ce7">
            <text:p>$21,255</text:p>
          </table:table-cell>
          <table:table-cell office:value-type="currency" office:value="12002.24" table:style-name="ce9">
            <text:p>$12,002</text:p>
          </table:table-cell>
          <table:table-cell office:value-type="currency" office:value="7045.9" table:style-name="ce7">
            <text:p>$7,046</text:p>
          </table:table-cell>
          <table:table-cell office:value-type="currency" office:value="9317.7999999999993" table:style-name="ce9">
            <text:p>$9,318</text:p>
          </table:table-cell>
          <table:table-cell office:value-type="currency" office:value="6801.86" table:style-name="ce7">
            <text:p>$6,802</text:p>
          </table:table-cell>
          <table:table-cell office:value-type="currency" office:value="6801.86" table:style-name="ce7">
            <text:p>$6,802</text:p>
          </table:table-cell>
          <table:table-cell office:value-type="currency" office:value="9416.35" table:style-name="ce7">
            <text:p>$9,416</text:p>
          </table:table-cell>
          <table:table-cell office:value-type="currency" office:value="9599.16" table:style-name="ce7">
            <text:p>$9,599</text:p>
          </table:table-cell>
          <table:table-cell office:value-type="currency" office:value="8976.4699999999993" table:style-name="ce7">
            <text:p>$8,976</text:p>
          </table:table-cell>
          <table:table-cell office:value-type="currency" office:value="12873.84" table:style-name="ce7">
            <text:p>$12,874</text:p>
          </table:table-cell>
          <table:table-cell office:value-type="currency" office:value="19922.3" table:style-name="ce7">
            <text:p>$19,922</text:p>
          </table:table-cell>
          <table:table-cell table:style-name="ce2"/>
          <table:table-cell office:value-type="currency" office:value="12007.268333333333" table:formula="of:=SUM([.B15:.M15])/12" table:style-name="ce10">
            <text:p>$12,007.27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2024 Actual</text:p>
          </table:table-cell>
          <table:table-cell office:value-type="currency" office:value="13875.128000000001" table:style-name="ce12">
            <text:p>$13,875</text:p>
          </table:table-cell>
          <table:table-cell office:value-type="currency" office:value="11707.519" table:style-name="ce12">
            <text:p>$11,708</text:p>
          </table:table-cell>
          <table:table-cell office:value-type="currency" office:value="9104.4619999999995" table:style-name="ce12">
            <text:p>$9,104</text:p>
          </table:table-cell>
          <table:table-cell office:value-type="currency" office:value="8194.3790000000008" table:style-name="ce12">
            <text:p>$8,194</text:p>
          </table:table-cell>
          <table:table-cell office:value-type="currency" office:value="8184.2939999999999" table:style-name="ce12">
            <text:p>$8,184</text:p>
          </table:table-cell>
          <table:table-cell office:value-type="currency" office:value="8001.7389999999996" table:style-name="ce12">
            <text:p>$8,002</text:p>
          </table:table-cell>
          <table:table-cell office:value-type="currency" office:value="6707.826" table:style-name="ce12">
            <text:p>$6,708</text:p>
          </table:table-cell>
          <table:table-cell office:value-type="currency" office:value="8465.8230000000003" table:style-name="ce12">
            <text:p>$8,466</text:p>
          </table:table-cell>
          <table:table-cell office:value-type="currency" office:value="8744" table:style-name="ce12">
            <text:p>$8,744</text:p>
          </table:table-cell>
          <table:table-cell office:value-type="currency" office:value="10057.921" table:style-name="ce12">
            <text:p>$10,058</text:p>
          </table:table-cell>
          <table:table-cell office:value-type="currency" office:value="25970.32" table:style-name="ce12">
            <text:p>$25,970</text:p>
          </table:table-cell>
          <table:table-cell office:value-type="currency" office:value="25814.577000000001" table:style-name="ce12">
            <text:p>$25,815</text:p>
          </table:table-cell>
          <table:table-cell table:style-name="ce2"/>
          <table:table-cell office:value-type="currency" office:value="12068.998999999998" table:formula="of:=SUM([.B16:.M16])/12" table:style-name="ce10">
            <text:p>$12,069.00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Variance to 2025</text:p>
          </table:table-cell>
          <table:table-cell office:value-type="currency" office:value="-4716.3799999999992" table:formula="of:=[.B12]-[.B15]" table:style-name="ce7">
            <text:p>-$4,716</text:p>
          </table:table-cell>
          <table:table-cell office:value-type="currency" office:value="-6662.2799999999988" table:formula="of:=IF([.C12]=0; 0; [.C12]-[.C15])" table:style-name="ce7">
            <text:p>-$6,662</text:p>
          </table:table-cell>
          <table:table-cell office:value-type="currency" office:value="13123.519999999999" table:formula="of:=IF([.D12]=0; 0; [.D12]-[.D15])" table:style-name="ce7">
            <text:p>$13,124</text:p>
          </table:table-cell>
          <table:table-cell office:value-type="currency" office:value="13960.460000000001" table:formula="of:=IF([.E12]=0; 0; [.E12]-[.E15])" table:style-name="ce7">
            <text:p>$13,960</text:p>
          </table:table-cell>
          <table:table-cell office:value-type="currency" office:value="4911.58" table:formula="of:=IF([.F12]=0; 0; [.F12]-[.F15])" table:style-name="ce7">
            <text:p>$4,912</text:p>
          </table:table-cell>
          <table:table-cell office:value-type="currency" office:value="6547.3200000000006" table:formula="of:=IF([.G12]=0; 0; [.G12]-[.G15])" table:style-name="ce7">
            <text:p>$6,547</text:p>
          </table:table-cell>
          <table:table-cell office:value-type="currency" office:value="0" table:formula="of:=IF([.H12]=0; 0; [.H12]-[.H15])" table:style-name="ce7">
            <text:p>$0</text:p>
          </table:table-cell>
          <table:table-cell office:value-type="currency" office:value="0" table:formula="of:=IF([.I12]=0; 0; [.I12]-[.I15])" table:style-name="ce7">
            <text:p>$0</text:p>
          </table:table-cell>
          <table:table-cell office:value-type="currency" office:value="0" table:formula="of:=IF([.J12]=0; 0; [.J12]-[.J15])" table:style-name="ce7">
            <text:p>$0</text:p>
          </table:table-cell>
          <table:table-cell office:value-type="currency" office:value="0" table:formula="of:=IF([.K12]=0; 0; [.K12]-[.K15])" table:style-name="ce7">
            <text:p>$0</text:p>
          </table:table-cell>
          <table:table-cell office:value-type="currency" office:value="0" table:formula="of:=IF([.L12]=0; 0; [.L12]-[.L15])" table:style-name="ce7">
            <text:p>$0</text:p>
          </table:table-cell>
          <table:table-cell office:value-type="currency" office:value="0" table:formula="of:=IF([.M12]=0; 0; [.M12]-[.M15])" table:style-name="ce7">
            <text:p>$0</text:p>
          </table:table-cell>
          <table:table-cell table:style-name="ce2"/>
          <table:table-cell table:number-columns-repeated="16370"/>
        </table:table-row>
        <table:table-row table:style-name="ro1">
          <table:table-cell office:value-type="string" table:style-name="ce11">
            <text:p>YTD</text:p>
          </table:table-cell>
          <table:table-cell office:value-type="currency" office:value="15357.76" table:formula="of:=[.B12]" table:style-name="ce7">
            <text:p>$15,358</text:p>
          </table:table-cell>
          <table:table-cell office:value-type="currency" office:value="29950.78" table:formula="of:=[.B18]+[.C12]" table:style-name="ce7">
            <text:p>$29,951</text:p>
          </table:table-cell>
          <table:table-cell office:value-type="currency" office:value="55076.539999999994" table:formula="of:=[.C18]+[.D12]" table:style-name="ce7">
            <text:p>$55,077</text:p>
          </table:table-cell>
          <table:table-cell office:value-type="currency" office:value="76082.899999999994" table:formula="of:=[.D18]+[.E12]" table:style-name="ce7">
            <text:p>$76,083</text:p>
          </table:table-cell>
          <table:table-cell office:value-type="currency" office:value="90312.28" table:formula="of:=[.E18]+[.F12]" table:style-name="ce7">
            <text:p>$90,312</text:p>
          </table:table-cell>
          <table:table-cell office:value-type="currency" office:value="103661.45999999999" table:formula="of:=[.F18]+[.G12]" table:style-name="ce7">
            <text:p>$103,661</text:p>
          </table:table-cell>
          <table:table-cell office:value-type="currency" office:value="103661.45999999999" table:formula="of:=[.G18]+[.H12]" table:style-name="ce7">
            <text:p>$103,661</text:p>
          </table:table-cell>
          <table:table-cell office:value-type="currency" office:value="103661.45999999999" table:formula="of:=[.H18]+[.I12]" table:style-name="ce7">
            <text:p>$103,661</text:p>
          </table:table-cell>
          <table:table-cell office:value-type="currency" office:value="103661.45999999999" table:formula="of:=[.I18]+[.J12]" table:style-name="ce7">
            <text:p>$103,661</text:p>
          </table:table-cell>
          <table:table-cell office:value-type="currency" office:value="103661.45999999999" table:formula="of:=[.J18]+[.K12]" table:style-name="ce7">
            <text:p>$103,661</text:p>
          </table:table-cell>
          <table:table-cell office:value-type="currency" office:value="103661.45999999999" table:formula="of:=[.K18]+[.L12]" table:style-name="ce7">
            <text:p>$103,661</text:p>
          </table:table-cell>
          <table:table-cell office:value-type="currency" office:value="103661.45999999999" table:formula="of:=[.L18]+[.M12]" table:style-name="ce7">
            <text:p>$103,661</text:p>
          </table:table-cell>
          <table:table-cell table:style-name="ce2"/>
          <table:table-cell table:number-columns-repeated="16370"/>
        </table:table-row>
        <table:table-row table:style-name="ro1">
          <table:table-cell office:value-type="string" table:style-name="ce2">
            <text:p>YTD Variance to Plan</text:p>
          </table:table-cell>
          <table:table-cell office:value-type="currency" office:value="2024.4266666666663" table:formula="of:=[.B14]" table:style-name="ce13">
            <text:p>$2,024</text:p>
          </table:table-cell>
          <table:table-cell office:value-type="currency" office:value="3284.1133333333328" table:formula="of:=[.B19]+[.C14]" table:style-name="ce13">
            <text:p>$3,284</text:p>
          </table:table-cell>
          <table:table-cell office:value-type="currency" office:value="15076.539999999997" table:formula="of:=[.C19]+[.D14]" table:style-name="ce13">
            <text:p>$15,077</text:p>
          </table:table-cell>
          <table:table-cell office:value-type="currency" office:value="22749.566666666666" table:formula="of:=[.D19]+[.E14]" table:style-name="ce13">
            <text:p>$22,750</text:p>
          </table:table-cell>
          <table:table-cell office:value-type="currency" office:value="23645.613333333331" table:formula="of:=[.E19]+[.F14]" table:style-name="ce13">
            <text:p>$23,646</text:p>
          </table:table-cell>
          <table:table-cell office:value-type="currency" office:value="23661.46" table:formula="of:=[.F19]+[.G14]" table:style-name="ce13">
            <text:p>$23,661</text:p>
          </table:table-cell>
          <table:table-cell office:value-type="currency" office:value="23661.46" table:formula="of:=[.G19]+[.H14]" table:style-name="ce13">
            <text:p>$23,661</text:p>
          </table:table-cell>
          <table:table-cell office:value-type="currency" office:value="23661.46" table:formula="of:=[.H19]+[.I14]" table:style-name="ce13">
            <text:p>$23,661</text:p>
          </table:table-cell>
          <table:table-cell office:value-type="currency" office:value="23661.46" table:formula="of:=[.I19]+[.J14]" table:style-name="ce13">
            <text:p>$23,661</text:p>
          </table:table-cell>
          <table:table-cell office:value-type="currency" office:value="23661.46" table:formula="of:=[.J19]+[.K14]" table:style-name="ce13">
            <text:p>$23,661</text:p>
          </table:table-cell>
          <table:table-cell office:value-type="currency" office:value="23661.46" table:formula="of:=[.K19]+[.L14]" table:style-name="ce13">
            <text:p>$23,661</text:p>
          </table:table-cell>
          <table:table-cell office:value-type="currency" office:value="23661.46" table:formula="of:=[.L19]+[.M14]" table:style-name="ce13">
            <text:p>$23,661</text:p>
          </table:table-cell>
          <table:table-cell table:style-name="ce2"/>
          <table:table-cell table:number-columns-repeated="16370"/>
        </table:table-row>
        <table:table-row table:number-rows-repeated="2" table:style-name="ro1">
          <table:table-cell table:number-columns-repeated="14" table:style-name="ce2"/>
          <table:table-cell table:number-columns-repeated="16370"/>
        </table:table-row>
        <table:table-row table:number-rows-repeated="11" table:style-name="ro1">
          <table:table-cell table:number-columns-repeated="16384" table:style-name="ce1"/>
        </table:table-row>
        <table:table-row table:number-rows-repeated="969" table:style-name="ro1">
          <table:table-cell table:number-columns-repeated="16384"/>
        </table:table-row>
        <table:table-row table:number-rows-repeated="1047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P0" number:language="en" number:country="CA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currency-style style:name="N37P0" number:language="en" number:country="CA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37" number:language="en" number:country="CA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131</meta:generator>
    <dc:creator>Turan Furkan Topak</dc:creator>
    <dc:date>2026-07-15T23:14:01Z</dc:date>
    <meta:editing-cycles>9</meta:editing-cycles>
    <meta:editing-duration>PT192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0f9ed5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tr" fo:country="T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628031496063pt" svg:width="453.3451181102362pt" chart:style-name="Crt0">
        <chart:title chart:style-name="CT00">
          <text:p text:style-name="a0" text:class-names="" text:cond-style-name="">2026 Revenue Tracking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B$11:.$M$11"/>
          </chart:axis>
          <chart:series chart:label-cell-address="Sheet1.$A$12" chart:values-cell-range-address="Sheet1.$B$12:.$M$12" chart:class="chart:bar" chart:attached-axis="primary-y" chart:style-name="G0S0">
            <chart:data-point chart:repeated="12"/>
          </chart:series>
          <chart:series chart:label-cell-address="Sheet1.$A$13" chart:values-cell-range-address="Sheet1.$B$13:.$M$13" chart:class="chart:bar" chart:attached-axis="primary-y" chart:style-name="G0S1">
            <chart:data-point chart:repeated="12"/>
          </chart:series>
          <chart:series chart:label-cell-address="Sheet1.$A$15" chart:values-cell-range-address="Sheet1.$B$15:.$M$15" chart:class="chart:bar" chart:attached-axis="primary-y" chart:style-name="G0S2">
            <chart:data-point chart:repeated="12"/>
          </chart:series>
          <chart:series chart:label-cell-address="Sheet1.$A$16" chart:values-cell-range-address="Sheet1.$B$16:.$M$16" chart:class="chart:bar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