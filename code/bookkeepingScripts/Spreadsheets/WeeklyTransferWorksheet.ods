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4-06T00:00:00" table:style-name="ce4">
            <text:p>2026-04-06</text:p>
          </table:table-cell>
          <table:table-cell office:value-type="float" office:value="2532.1999999999998" table:style-name="ce5">
            <text:p>2,532.20</text:p>
          </table:table-cell>
          <table:table-cell office:value-type="float" office:value="2126.3000000000002" table:style-name="ce5">
            <text:p>2,126.30</text:p>
          </table:table-cell>
          <table:table-cell office:value-type="float" office:value="2224.11" table:style-name="ce5">
            <text:p>2,224.11</text:p>
          </table:table-cell>
          <table:table-cell office:value-type="float" office:value="0.83970460469157271" table:formula="of:=[.C7]/[.B7]" table:style-name="ce6">
            <text:p>0.839704604692</text:p>
          </table:table-cell>
          <table:table-cell office:value-type="float" office:value="1.1908949818934298" table:formula="of:=[.B7]/[.C7]" table:style-name="ce7">
            <text:p>1.1909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4-13T00:00:00" table:style-name="ce4">
            <text:p>2026-04-13</text:p>
          </table:table-cell>
          <table:table-cell office:value-type="float" office:value="1278.45" table:style-name="ce5">
            <text:p>1,278.45</text:p>
          </table:table-cell>
          <table:table-cell office:value-type="float" office:value="1056.31" table:style-name="ce5">
            <text:p>1,056.31</text:p>
          </table:table-cell>
          <table:table-cell office:value-type="float" office:value="129.47" table:style-name="ce5">
            <text:p>129.47</text:p>
          </table:table-cell>
          <table:table-cell office:value-type="float" office:value="0.82624271578865027" table:formula="of:=[.C8]/[.B8]" table:style-name="ce6">
            <text:p>0.826242715789</text:p>
          </table:table-cell>
          <table:table-cell office:value-type="float" office:value="1.2102981132432715" table:formula="of:=[.B8]/[.C8]" table:style-name="ce7">
            <text:p>1.2103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4-20T00:00:00" table:style-name="ce4">
            <text:p>2026-04-20</text:p>
          </table:table-cell>
          <table:table-cell office:value-type="float" office:value="1053.29" table:style-name="ce5">
            <text:p>1,053.29</text:p>
          </table:table-cell>
          <table:table-cell office:value-type="float" office:value="862.2" table:style-name="ce5">
            <text:p>862.20</text:p>
          </table:table-cell>
          <table:table-cell office:value-type="float" office:value="885.3" table:style-name="ce5">
            <text:p>885.30</text:p>
          </table:table-cell>
          <table:table-cell office:value-type="float" office:value="0.81857797947383915" table:formula="of:=[.C9]/[.B9]" table:style-name="ce8">
            <text:p>0.8185779794738</text:p>
          </table:table-cell>
          <table:table-cell office:value-type="float" office:value="1.2216307121317558" table:formula="of:=[.B9]/[.C9]" table:style-name="ce7">
            <text:p>1.2216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4-27T00:00:00" table:style-name="ce4">
            <text:p>2026-04-27</text:p>
          </table:table-cell>
          <table:table-cell office:value-type="float" office:value="1772.87" table:style-name="ce5">
            <text:p>1,772.87</text:p>
          </table:table-cell>
          <table:table-cell office:value-type="float" office:value="1466.57" table:style-name="ce5">
            <text:p>1,466.57</text:p>
          </table:table-cell>
          <table:table-cell office:value-type="float" office:value="980.36" table:style-name="ce5">
            <text:p>980.36</text:p>
          </table:table-cell>
          <table:table-cell office:value-type="float" office:value="0.82722929487215646" table:formula="of:=[.C10]/[.B10]" table:style-name="ce6">
            <text:p>0.827229294872</text:p>
          </table:table-cell>
          <table:table-cell office:value-type="float" office:value="1.2088546745126383" table:formula="of:=[.B10]/[.C10]" table:style-name="ce7">
            <text:p>1.2089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creator>Turan Furkan Topak</dc:creator>
    <meta:creation-date>2025-02-06T10:04:39Z</meta:creation-date>
    <dc:date>2026-05-19T16:20:40Z</dc:date>
    <meta:editing-cycles>15</meta:editing-cycles>
    <meta:editing-duration>PT4038S</meta:editing-duration>
  </office:meta>
</office:document-meta>
</file>