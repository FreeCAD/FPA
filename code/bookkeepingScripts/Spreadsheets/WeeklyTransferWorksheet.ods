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5-04T00:00:00" table:style-name="ce4">
            <text:p>2026-05-04</text:p>
          </table:table-cell>
          <table:table-cell office:value-type="float" office:value="782.15" table:style-name="ce5">
            <text:p>782.15</text:p>
          </table:table-cell>
          <table:table-cell office:value-type="float" office:value="643.73" table:style-name="ce5">
            <text:p>643.73</text:p>
          </table:table-cell>
          <table:table-cell office:value-type="float" office:value="690.48" table:style-name="ce5">
            <text:p>690.48</text:p>
          </table:table-cell>
          <table:table-cell office:value-type="float" office:value="0.82302627373266002" table:formula="of:=[.C7]/[.B7]" table:style-name="ce6">
            <text:p>0.823026273733</text:p>
          </table:table-cell>
          <table:table-cell office:value-type="float" office:value="1.215028039706088" table:formula="of:=[.B7]/[.C7]" table:style-name="ce7">
            <text:p>1.2150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5-11T00:00:00" table:style-name="ce4">
            <text:p>2026-05-11</text:p>
          </table:table-cell>
          <table:table-cell office:value-type="float" office:value="1428.98" table:style-name="ce5">
            <text:p>1,428.98</text:p>
          </table:table-cell>
          <table:table-cell office:value-type="float" office:value="1192.57" table:style-name="ce5">
            <text:p>1,192.57</text:p>
          </table:table-cell>
          <table:table-cell office:value-type="float" office:value="1192.57" table:style-name="ce5">
            <text:p>1,192.57</text:p>
          </table:table-cell>
          <table:table-cell office:value-type="float" office:value="0.83456031574969558" table:formula="of:=[.C8]/[.B8]" table:style-name="ce6">
            <text:p>0.834560315750</text:p>
          </table:table-cell>
          <table:table-cell office:value-type="float" office:value="1.1982357429752553" table:formula="of:=[.B8]/[.C8]" table:style-name="ce7">
            <text:p>1.1982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5-16T00:00:00" table:style-name="ce4">
            <text:p>2026-05-16</text:p>
          </table:table-cell>
          <table:table-cell office:value-type="float" office:value="999.86" table:style-name="ce5">
            <text:p>999.86</text:p>
          </table:table-cell>
          <table:table-cell office:value-type="float" office:value="841.03" table:style-name="ce5">
            <text:p>841.03</text:p>
          </table:table-cell>
          <table:table-cell office:value-type="float" office:value="850.34" table:style-name="ce5">
            <text:p>850.34</text:p>
          </table:table-cell>
          <table:table-cell office:value-type="float" office:value="0.8411477606864961" table:formula="of:=[.C9]/[.B9]" table:style-name="ce8">
            <text:p>0.8411477606865</text:p>
          </table:table-cell>
          <table:table-cell office:value-type="float" office:value="1.188851765097559" table:formula="of:=[.B9]/[.C9]" table:style-name="ce7">
            <text:p>1.1889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5-23T00:00:00" table:style-name="ce4">
            <text:p>2026-05-23</text:p>
          </table:table-cell>
          <table:table-cell office:value-type="float" office:value="866.17" table:style-name="ce5">
            <text:p>866.17</text:p>
          </table:table-cell>
          <table:table-cell office:value-type="float" office:value="724.43" table:style-name="ce5">
            <text:p>724.43</text:p>
          </table:table-cell>
          <table:table-cell office:value-type="float" office:value="776.16" table:style-name="ce5">
            <text:p>776.16</text:p>
          </table:table-cell>
          <table:table-cell office:value-type="float" office:value="0.83636006788505723" table:formula="of:=[.C10]/[.B10]" table:style-name="ce6">
            <text:p>0.836360067885</text:p>
          </table:table-cell>
          <table:table-cell office:value-type="float" office:value="1.1956572753751225" table:formula="of:=[.B10]/[.C10]" table:style-name="ce7">
            <text:p>1.1957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5-30T00:00:00" table:style-name="ce4">
            <text:p>2026-05-30</text:p>
          </table:table-cell>
          <table:table-cell office:value-type="float" office:value="7938.93" table:style-name="ce2">
            <text:p>7938.93</text:p>
          </table:table-cell>
          <table:table-cell office:value-type="float" office:value="6667.98" table:style-name="ce2">
            <text:p>6667.98</text:p>
          </table:table-cell>
          <table:table-cell office:value-type="float" office:value="6821.77" table:style-name="ce2">
            <text:p>6821.77</text:p>
          </table:table-cell>
          <table:table-cell office:value-type="float" office:value="0.83990915652361209" table:formula="of:=[.C11]/[.B11]" table:style-name="ce2">
            <text:p>0.839909157</text:p>
          </table:table-cell>
          <table:table-cell office:value-type="float" office:value="1.1906049508246876" table:formula="of:=[.B11]/[.C11]" table:style-name="ce2">
            <text:p>1.190604951</text:p>
          </table:table-cell>
          <table:table-cell table:number-columns-repeated="6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Turan Furkan Topak</dc:creator>
    <meta:creation-date>2025-02-06T10:04:39Z</meta:creation-date>
    <dc:date>2026-06-21T13:34:08Z</dc:date>
    <meta:editing-cycles>15</meta:editing-cycles>
    <meta:editing-duration>PT4038S</meta:editing-duration>
  </office:meta>
</office:document-meta>
</file>