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1F4E78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1.9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36">
      <style:map style:condition="of:cell-content()&lt;0" style:apply-style-name="cf1"/>
      <style:map style:condition="of:cell-content()&gt;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5-2026_Month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Expense</text:p>
          </table:table-cell>
          <table:table-cell office:value-type="string" table:style-name="ce2">
            <text:p>Expense VAT</text:p>
          </table:table-cell>
          <table:table-cell office:value-type="string" table:style-name="ce2">
            <text:p>Income - Expense</text:p>
          </table:table-cell>
          <table:table-cell office:value-type="string" table:style-name="ce2">
            <text:p>Income - (Expense + VAT)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August</text:p>
          </table:table-cell>
          <table:table-cell office:value-type="currency" office:value="8420.34" table:style-name="ce4">
            <text:p><text:s/>€ 8,420.34<text:s/></text:p>
          </table:table-cell>
          <table:table-cell office:value-type="currency" office:value="5162.7" table:style-name="ce4">
            <text:p><text:s/>€ 5,162.70<text:s/></text:p>
          </table:table-cell>
          <table:table-cell office:value-type="currency" office:value="517.35" table:style-name="ce4">
            <text:p><text:s/>€ 517.35<text:s/></text:p>
          </table:table-cell>
          <table:table-cell office:value-type="currency" office:value="3257.6400000000003" table:formula="of:=[.C2]-[.D2]" table:style-name="ce5">
            <text:p><text:s/>€ 3,257.64<text:s/></text:p>
          </table:table-cell>
          <table:table-cell office:value-type="currency" office:value="2740.29" table:formula="of:=[.C2]-([.D2]+[.E2])" table:style-name="ce5">
            <text:p><text:s/>€ 2,740.29<text:s/>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September</text:p>
          </table:table-cell>
          <table:table-cell office:value-type="currency" office:value="7952.97" table:style-name="ce4">
            <text:p><text:s/>€ 7,952.97<text:s/></text:p>
          </table:table-cell>
          <table:table-cell office:value-type="currency" office:value="9790.3799999999992" table:style-name="ce4">
            <text:p><text:s/>€ 9,790.38<text:s/></text:p>
          </table:table-cell>
          <table:table-cell office:value-type="currency" office:value="1776.57" table:style-name="ce4">
            <text:p><text:s/>€ 1,776.57<text:s/></text:p>
          </table:table-cell>
          <table:table-cell office:value-type="currency" office:value="-1837.4099999999989" table:formula="of:=[.C3]-[.D3]" table:style-name="ce5">
            <text:p><text:s/>€ (1,837.41)</text:p>
          </table:table-cell>
          <table:table-cell office:value-type="currency" office:value="-3613.9799999999987" table:formula="of:=[.C3]-([.D3]+[.E3])" table:style-name="ce5">
            <text:p><text:s/>€ (3,613.98)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October</text:p>
          </table:table-cell>
          <table:table-cell office:value-type="currency" office:value="7473.49" table:style-name="ce4">
            <text:p><text:s/>€ 7,473.49<text:s/></text:p>
          </table:table-cell>
          <table:table-cell office:value-type="currency" office:value="18154.7" table:style-name="ce4">
            <text:p><text:s/>€ 18,154.70<text:s/></text:p>
          </table:table-cell>
          <table:table-cell office:value-type="currency" office:value="2808.51" table:style-name="ce4">
            <text:p><text:s/>€ 2,808.51<text:s/></text:p>
          </table:table-cell>
          <table:table-cell office:value-type="currency" office:value="-10681.210000000001" table:formula="of:=[.C4]-[.D4]" table:style-name="ce5">
            <text:p><text:s/>€ (10,681.21)</text:p>
          </table:table-cell>
          <table:table-cell office:value-type="currency" office:value="-13489.72" table:formula="of:=[.C4]-([.D4]+[.E4])" table:style-name="ce5">
            <text:p><text:s/>€ (13,489.72)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November</text:p>
          </table:table-cell>
          <table:table-cell office:value-type="currency" office:value="10807.27" table:style-name="ce4">
            <text:p><text:s/>€ 10,807.27<text:s/></text:p>
          </table:table-cell>
          <table:table-cell office:value-type="currency" office:value="5683.78" table:style-name="ce4">
            <text:p><text:s/>€ 5,683.78<text:s/></text:p>
          </table:table-cell>
          <table:table-cell office:value-type="currency" office:value="636.33000000000004" table:style-name="ce4">
            <text:p><text:s/>€ 636.33<text:s/></text:p>
          </table:table-cell>
          <table:table-cell office:value-type="currency" office:value="5123.4900000000007" table:formula="of:=[.C5]-[.D5]" table:style-name="ce5">
            <text:p><text:s/>€ 5,123.49<text:s/></text:p>
          </table:table-cell>
          <table:table-cell office:value-type="currency" office:value="4487.1600000000008" table:formula="of:=[.C5]-([.D5]+[.E5])" table:style-name="ce5">
            <text:p><text:s/>€ 4,487.16<text:s/></text:p>
          </table:table-cell>
          <table:table-cell table:number-columns-repeated="16377"/>
        </table:table-row>
        <table:table-row table:style-name="ro2">
          <table:table-cell office:value-type="float" office:value="2025" table:style-name="ce3">
            <text:p>2025</text:p>
          </table:table-cell>
          <table:table-cell office:value-type="string" table:style-name="ce4">
            <text:p>December</text:p>
          </table:table-cell>
          <table:table-cell office:value-type="currency" office:value="16379.74" table:style-name="ce4">
            <text:p><text:s/>€ 16,379.74<text:s/></text:p>
          </table:table-cell>
          <table:table-cell office:value-type="currency" office:value="21234.32" table:style-name="ce4">
            <text:p><text:s/>€ 21,234.32<text:s/></text:p>
          </table:table-cell>
          <table:table-cell office:value-type="currency" office:value="2641.3" table:style-name="ce4">
            <text:p><text:s/>€ 2,641.30<text:s/></text:p>
          </table:table-cell>
          <table:table-cell office:value-type="currency" office:value="-4854.58" table:formula="of:=[.C6]-[.D6]" table:style-name="ce5">
            <text:p><text:s/>€ (4,854.58)</text:p>
          </table:table-cell>
          <table:table-cell office:value-type="currency" office:value="-7495.8799999999992" table:formula="of:=[.C6]-([.D6]+[.E6])" table:style-name="ce5">
            <text:p><text:s/>€ (7,495.88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January</text:p>
          </table:table-cell>
          <table:table-cell office:value-type="currency" office:value="15747.88" table:style-name="ce4">
            <text:p><text:s/>€ 15,747.88<text:s/></text:p>
          </table:table-cell>
          <table:table-cell office:value-type="currency" office:value="16356.68" table:style-name="ce4">
            <text:p><text:s/>€ 16,356.68<text:s/></text:p>
          </table:table-cell>
          <table:table-cell office:value-type="currency" office:value="2351.64" table:style-name="ce4">
            <text:p><text:s/>€ 2,351.64<text:s/></text:p>
          </table:table-cell>
          <table:table-cell office:value-type="currency" office:value="-608.80000000000109" table:formula="of:=[.C7]-[.D7]" table:style-name="ce5">
            <text:p><text:s/>€ (608.80)</text:p>
          </table:table-cell>
          <table:table-cell office:value-type="currency" office:value="-2960.4400000000005" table:formula="of:=[.C7]-([.D7]+[.E7])" table:style-name="ce5">
            <text:p><text:s/>€ (2,960.44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February</text:p>
          </table:table-cell>
          <table:table-cell office:value-type="currency" office:value="14806.65" table:style-name="ce4">
            <text:p><text:s/>€ 14,806.65<text:s/></text:p>
          </table:table-cell>
          <table:table-cell office:value-type="currency" office:value="26083.58" table:style-name="ce4">
            <text:p><text:s/>€ 26,083.58<text:s/></text:p>
          </table:table-cell>
          <table:table-cell office:value-type="currency" office:value="3323" table:style-name="ce4">
            <text:p><text:s/>€ 3,323.00<text:s/></text:p>
          </table:table-cell>
          <table:table-cell office:value-type="currency" office:value="-11276.930000000002" table:formula="of:=[.C8]-[.D8]" table:style-name="ce5">
            <text:p><text:s/>€ (11,276.93)</text:p>
          </table:table-cell>
          <table:table-cell office:value-type="currency" office:value="-14599.930000000002" table:formula="of:=[.C8]-([.D8]+[.E8])" table:style-name="ce5">
            <text:p><text:s/>€ (14,599.93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March</text:p>
          </table:table-cell>
          <table:table-cell office:value-type="currency" office:value="26363.82" table:style-name="ce4">
            <text:p><text:s/>€ 26,363.82<text:s/></text:p>
          </table:table-cell>
          <table:table-cell office:value-type="currency" office:value="12662.21" table:style-name="ce4">
            <text:p><text:s/>€ 12,662.21<text:s/></text:p>
          </table:table-cell>
          <table:table-cell office:value-type="currency" office:value="1522.31" table:style-name="ce4">
            <text:p><text:s/>€ 1,522.31<text:s/></text:p>
          </table:table-cell>
          <table:table-cell office:value-type="currency" office:value="13701.61" table:formula="of:=[.C9]-[.D9]" table:style-name="ce5">
            <text:p><text:s/>€ 13,701.61<text:s/></text:p>
          </table:table-cell>
          <table:table-cell office:value-type="currency" office:value="12179.300000000001" table:formula="of:=[.C9]-([.D9]+[.E9])" table:style-name="ce5">
            <text:p><text:s/>€ 12,179.30<text:s/>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April</text:p>
          </table:table-cell>
          <table:table-cell office:value-type="currency" office:value="20660.68" table:style-name="ce4">
            <text:p><text:s/>€ 20,660.68<text:s/></text:p>
          </table:table-cell>
          <table:table-cell office:value-type="currency" office:value="28332.49" table:style-name="ce4">
            <text:p><text:s/>€ 28,332.49<text:s/></text:p>
          </table:table-cell>
          <table:table-cell office:value-type="currency" office:value="3810.61" table:style-name="ce4">
            <text:p><text:s/>€ 3,810.61<text:s/></text:p>
          </table:table-cell>
          <table:table-cell office:value-type="currency" office:value="-7671.8100000000013" table:formula="of:=[.C10]-[.D10]" table:style-name="ce5">
            <text:p><text:s/>€ (7,671.81)</text:p>
          </table:table-cell>
          <table:table-cell office:value-type="currency" office:value="-11482.420000000002" table:formula="of:=[.C10]-([.D10]+[.E10])" table:style-name="ce5">
            <text:p><text:s/>€ (11,482.42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4">
            <text:p>May</text:p>
          </table:table-cell>
          <table:table-cell office:value-type="currency" office:value="11951.39" table:style-name="ce4">
            <text:p><text:s/>€ 11,951.39<text:s/></text:p>
          </table:table-cell>
          <table:table-cell office:value-type="currency" office:value="13204.74" table:style-name="ce4">
            <text:p><text:s/>€ 13,204.74<text:s/></text:p>
          </table:table-cell>
          <table:table-cell office:value-type="currency" office:value="1160.44" table:style-name="ce4">
            <text:p><text:s/>€ 1,160.44<text:s/></text:p>
          </table:table-cell>
          <table:table-cell office:value-type="currency" office:value="-1253.3500000000004" table:formula="of:=[.C11]-[.D11]" table:style-name="ce5">
            <text:p><text:s/>€ (1,253.35)</text:p>
          </table:table-cell>
          <table:table-cell office:value-type="currency" office:value="-2413.7900000000009" table:formula="of:=[.C11]-([.D11]+[.E11])" table:style-name="ce5">
            <text:p><text:s/>€ (2,413.79)</text:p>
          </table:table-cell>
          <table:table-cell table:number-columns-repeated="16377"/>
        </table:table-row>
        <table:table-row table:style-name="ro2">
          <table:table-cell office:value-type="float" office:value="2026" table:style-name="ce3">
            <text:p>2026</text:p>
          </table:table-cell>
          <table:table-cell office:value-type="string" table:style-name="ce1">
            <text:p>June</text:p>
          </table:table-cell>
          <table:table-cell office:value-type="currency" office:value="11322.89" table:style-name="ce4">
            <text:p><text:s/>€ 11,322.89<text:s/></text:p>
          </table:table-cell>
          <table:table-cell office:value-type="currency" office:value="10514.28" table:style-name="ce4">
            <text:p><text:s/>€ 10,514.28<text:s/></text:p>
          </table:table-cell>
          <table:table-cell office:value-type="currency" office:value="932.89" table:style-name="ce4">
            <text:p><text:s/>€ 932.89<text:s/></text:p>
          </table:table-cell>
          <table:table-cell office:value-type="currency" office:value="808.60999999999876" table:formula="of:=[.C12]-[.D12]" table:style-name="ce5">
            <text:p><text:s/>€ 808.61<text:s/></text:p>
          </table:table-cell>
          <table:table-cell office:value-type="currency" office:value="-124.28000000000065" table:formula="of:=[.C12]-([.D12]+[.E12])" table:style-name="ce5">
            <text:p><text:s/>€ (124.28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All</text:p>
          </table:table-cell>
          <table:table-cell office:value-type="string" table:style-name="ce4">
            <text:p>Grand Total</text:p>
          </table:table-cell>
          <table:table-cell office:value-type="currency" office:value="151887.12" table:formula="of:=SUM([.C2:.C12])" table:style-name="ce4">
            <text:p><text:s/>€ 151,887.12<text:s/></text:p>
          </table:table-cell>
          <table:table-cell office:value-type="currency" office:value="167179.85999999999" table:formula="of:=SUM([.D2:.D12])" table:style-name="ce4">
            <text:p><text:s/>€ 167,179.86<text:s/></text:p>
          </table:table-cell>
          <table:table-cell office:value-type="currency" office:value="21480.949999999997" table:formula="of:=SUM([.E2:.E12])" table:style-name="ce4">
            <text:p><text:s/>€ 21,480.95<text:s/></text:p>
          </table:table-cell>
          <table:table-cell office:value-type="currency" office:value="-15292.740000000005" table:formula="of:=SUM([.F2:.F12])" table:style-name="ce5">
            <text:p><text:s/>€ (15,292.74)</text:p>
          </table:table-cell>
          <table:table-cell office:value-type="currency" office:value="-36773.689999999995" table:formula="of:=SUM([.G2:.G12])" table:style-name="ce5">
            <text:p><text:s/>€ (36,773.69)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ll</text:p>
          </table:table-cell>
          <table:table-cell office:value-type="string" table:style-name="ce4">
            <text:p>Average</text:p>
          </table:table-cell>
          <table:table-cell office:value-type="currency" office:value="13807.92" table:formula="of:=AVERAGE([.C2:.C12])" table:style-name="ce4">
            <text:p><text:s/>€ 13,807.92<text:s/></text:p>
          </table:table-cell>
          <table:table-cell office:value-type="currency" office:value="15198.16909090909" table:formula="of:=AVERAGE([.D2:.D12])" table:style-name="ce4">
            <text:p><text:s/>€ 15,198.17<text:s/></text:p>
          </table:table-cell>
          <table:table-cell office:value-type="currency" office:value="1952.8136363636361" table:formula="of:=AVERAGE([.E2:.E12])" table:style-name="ce4">
            <text:p><text:s/>€ 1,952.81<text:s/></text:p>
          </table:table-cell>
          <table:table-cell office:value-type="currency" office:value="-1390.2490909090914" table:formula="of:=AVERAGE([.F2:.F12])" table:style-name="ce5">
            <text:p><text:s/>€ (1,390.25)</text:p>
          </table:table-cell>
          <table:table-cell office:value-type="currency" office:value="-3343.062727272727" table:formula="of:=AVERAGE([.G2:.G12])" table:style-name="ce5">
            <text:p><text:s/>€ (3,343.06)</text:p>
          </table:table-cell>
          <table:table-cell table:number-columns-repeated="16377"/>
        </table:table-row>
        <table:table-row table:number-rows-repeated="1048561" table:style-name="ro2">
          <table:table-cell table:number-columns-repeated="16384"/>
        </table:table-row>
      </table:table>
      <table:database-ranges>
        <table:database-range table:target-range-address="2025-2026_Monthly.A1:2025-2026_Monthly.G15" table:name="FinanceVAT2025_2026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styles>
    <number:number-style style:name="N0">
      <number:number number:min-integer-digits="1"/>
    </number:number-style>
    <number:currency-style style:name="N36P0" number:language="en" number:country="US">
      <number:text> </number:text>
      <number:currency-symbol number:language="en" number:country="US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€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6P2" number:language="en" number:country="US">
      <number:text> </number:text>
      <number:currency-symbol number:language="en" number:country="US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f1" style:family="table-cell" style:data-style-name="N0">
      <style:text-properties fo:color="#C00000" fo:font-weight="bold" style:font-weight-asian="bold" style:font-weight-complex="bold"/>
    </style:style>
    <style:style style:name="cf2" style:family="table-cell" style:data-style-name="N0">
      <style:text-properties fo:color="#0080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31</meta:generator>
    <dc:creator>Turan Furkan Topak</dc:creator>
    <meta:creation-date>2026-06-09T20:23:12Z</meta:creation-date>
    <dc:date>2026-07-15T23:13:56Z</dc:date>
  </office:meta>
</office:document-meta>
</file>